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65000002AC4D63A242.png" manifest:media-type="image/png"/>
  <manifest:file-entry manifest:full-path="Pictures/100000010000062B0000023ED55EC76E.png" manifest:media-type="image/png"/>
  <manifest:file-entry manifest:full-path="Pictures/1000000100000565000002AC9BD7ACD2.png" manifest:media-type="image/png"/>
  <manifest:file-entry manifest:full-path="Pictures/10000001000006360000030D3BB6A452.png" manifest:media-type="image/png"/>
  <manifest:file-entry manifest:full-path="Pictures/100000010000057D000002AB95377B01.png" manifest:media-type="image/png"/>
  <manifest:file-entry manifest:full-path="Pictures/10000001000005D70000020EED40C8FF.png" manifest:media-type="image/png"/>
  <manifest:file-entry manifest:full-path="Pictures/100000010000063300000318ADDEC221.png" manifest:media-type="image/png"/>
  <manifest:file-entry manifest:full-path="Pictures/100000010000057D000002AB3ABED639.png" manifest:media-type="image/png"/>
  <manifest:file-entry manifest:full-path="Pictures/1000000100000570000002AC12181349.png" manifest:media-type="image/png"/>
  <manifest:file-entry manifest:full-path="Pictures/1000000100000574000002ABC3F49B34.png" manifest:media-type="image/png"/>
  <manifest:file-entry manifest:full-path="Pictures/1000000100000574000002AB82FC276C.png" manifest:media-type="image/png"/>
  <manifest:file-entry manifest:full-path="Pictures/1000000100000658000002EC5A55701D.png" manifest:media-type="image/png"/>
  <manifest:file-entry manifest:full-path="Pictures/1000000100000572000002AC2169BF9F.png" manifest:media-type="image/png"/>
  <manifest:file-entry manifest:full-path="Pictures/1000000100000572000002AC97F9C29E.png" manifest:media-type="image/png"/>
  <manifest:file-entry manifest:full-path="Pictures/100000010000064B000002BF2E4D6B9F.png" manifest:media-type="image/png"/>
  <manifest:file-entry manifest:full-path="Pictures/10000001000004F60000004C87EA1F46.png" manifest:media-type="image/png"/>
  <manifest:file-entry manifest:full-path="Pictures/1000000100000570000002ACB493D24C.png" manifest:media-type="image/png"/>
  <manifest:file-entry manifest:full-path="Pictures/1000000100000642000002F7EC3BDBBE.png" manifest:media-type="image/png"/>
  <manifest:file-entry manifest:full-path="Pictures/100000010000056F000002AC14714438.png" manifest:media-type="image/png"/>
  <manifest:file-entry manifest:full-path="Pictures/100000010000056F000002AC08BE2F6F.png" manifest:media-type="image/png"/>
  <manifest:file-entry manifest:full-path="Pictures/100000010000063D000002FEE2834327.png" manifest:media-type="image/png"/>
  <manifest:file-entry manifest:full-path="Pictures/1000000100000573000002ABB980FFFF.png" manifest:media-type="image/png"/>
  <manifest:file-entry manifest:full-path="Pictures/1000000100000573000002AB89CB410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pitch="variable"/>
    <style:font-face style:name="Arial1" svg:font-family="Arial" style:font-family-generic="swiss" style:font-pitch="variable"/>
    <style:font-face style:name="Arial2" svg:font-family="Arial" style:font-adornments="Negrito"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Sans" svg:font-family="Liberation-Sans" style:font-pitch="variable"/>
    <style:font-face style:name="Liberation-Sans-Bold" svg:font-family="Liberation-Sans-Bold"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Default">
      <style:text-properties style:use-window-font-color="true" loext:opacity="0%" style:font-name="Arial2"/>
    </style:style>
    <style:style style:name="P2" style:family="paragraph" style:parent-style-name="Default">
      <style:paragraph-properties fo:text-align="center" style:justify-single-word="false"/>
      <style:text-properties style:use-window-font-color="true" loext:opacity="0%" style:font-name="Arial2"/>
    </style:style>
    <style:style style:name="P3" style:family="paragraph" style:parent-style-name="Default">
      <style:paragraph-properties fo:text-align="center" style:justify-single-word="false"/>
      <style:text-properties style:use-window-font-color="true" loext:opacity="0%" style:font-name="Arial2" officeooo:paragraph-rsid="001b9a16"/>
    </style:style>
    <style:style style:name="P4" style:family="paragraph" style:parent-style-name="Default">
      <style:paragraph-properties fo:text-align="center" style:justify-single-word="false"/>
      <style:text-properties style:use-window-font-color="true" loext:opacity="0%" style:text-line-through-style="none" style:text-line-through-type="none" style:font-name="Arial2" fo:font-size="15pt" style:text-underline-style="none" fo:font-weight="bold" officeooo:rsid="001b9a16" officeooo:paragraph-rsid="001b9a16" style:font-size-asian="15pt" style:font-weight-asian="bold"/>
    </style:style>
    <style:style style:name="P5" style:family="paragraph" style:parent-style-name="Default">
      <style:paragraph-properties fo:text-align="start" style:justify-single-word="false"/>
      <style:text-properties style:use-window-font-color="true" loext:opacity="0%" style:font-name="Arial2"/>
    </style:style>
    <style:style style:name="P6" style:family="paragraph" style:parent-style-name="Standard">
      <style:paragraph-properties fo:text-align="start" style:justify-single-word="false"/>
      <style:text-properties style:use-window-font-color="true" loext:opacity="0%" style:font-name="Arial2" officeooo:paragraph-rsid="001b9a16"/>
    </style:style>
    <style:style style:name="P7" style:family="paragraph" style:parent-style-name="Default">
      <style:paragraph-properties fo:text-align="start" style:justify-single-word="false"/>
      <style:text-properties style:use-window-font-color="true" loext:opacity="0%" style:font-name="Arial2" officeooo:paragraph-rsid="001b9a16"/>
    </style:style>
    <style:style style:name="P8" style:family="paragraph" style:parent-style-name="Default">
      <style:paragraph-properties fo:text-align="start" style:justify-single-word="false"/>
      <style:text-properties style:use-window-font-color="true" loext:opacity="0%" style:font-name="Arial2" fo:font-size="11pt" officeooo:paragraph-rsid="001b9a16" style:font-size-asian="11pt" style:font-size-complex="11pt"/>
    </style:style>
    <style:style style:name="P9" style:family="paragraph" style:parent-style-name="Standard">
      <style:paragraph-properties fo:text-align="start" style:justify-single-word="false"/>
      <style:text-properties style:use-window-font-color="true" loext:opacity="0%" style:font-name="Arial2" fo:font-size="11pt" style:font-size-asian="11pt" style:font-size-complex="11pt"/>
    </style:style>
    <style:style style:name="P10" style:family="paragraph" style:parent-style-name="Standard">
      <style:paragraph-properties fo:text-align="start" style:justify-single-word="false"/>
      <style:text-properties style:use-window-font-color="true" loext:opacity="0%" style:font-name="Arial2"/>
    </style:style>
    <style:style style:name="P11" style:family="paragraph" style:parent-style-name="Standard">
      <style:paragraph-properties fo:text-align="start" style:justify-single-word="false"/>
      <style:text-properties style:use-window-font-color="true" loext:opacity="0%" style:font-name="Arial2" officeooo:paragraph-rsid="001fc37c"/>
    </style:style>
    <style:style style:name="P12" style:family="paragraph" style:parent-style-name="Heading_20_4">
      <style:paragraph-properties fo:text-align="start" style:justify-single-word="false"/>
      <style:text-properties style:use-window-font-color="true" loext:opacity="0%" style:font-name="Arial2" fo:font-weight="bold" officeooo:paragraph-rsid="001fc37c"/>
    </style:style>
    <style:style style:name="P13" style:family="paragraph" style:parent-style-name="Text_20_body">
      <style:paragraph-properties fo:text-align="start" style:justify-single-word="false"/>
      <style:text-properties style:font-name="Arial2" fo:font-weight="bold" officeooo:paragraph-rsid="001fc37c"/>
    </style:style>
    <style:style style:name="P14" style:family="paragraph" style:parent-style-name="Text_20_body">
      <style:text-properties officeooo:paragraph-rsid="002eb815"/>
    </style:style>
    <style:style style:name="P15" style:family="paragraph" style:parent-style-name="Text_20_body">
      <style:text-properties officeooo:paragraph-rsid="003098fe"/>
    </style:style>
    <style:style style:name="P16" style:family="paragraph" style:parent-style-name="Text_20_body">
      <style:text-properties style:font-name="Arial1" fo:font-size="11pt" officeooo:paragraph-rsid="002eb815" style:font-size-asian="11pt" style:font-size-complex="11pt"/>
    </style:style>
    <style:style style:name="P17" style:family="paragraph" style:parent-style-name="Heading_20_4">
      <style:text-properties style:font-name="Arial1" fo:font-size="11pt" fo:font-weight="bold" officeooo:paragraph-rsid="002eb815" style:font-size-asian="11pt" style:font-size-complex="11pt"/>
    </style:style>
    <style:style style:name="P18" style:family="paragraph" style:parent-style-name="Text_20_body">
      <style:text-properties officeooo:paragraph-rsid="002ebd85"/>
    </style:style>
    <style:style style:name="P19" style:family="paragraph" style:parent-style-name="Text_20_body">
      <style:text-properties style:use-window-font-color="true" loext:opacity="0%" style:font-name="Arial1" fo:font-size="11pt" officeooo:paragraph-rsid="002f1ca2" style:font-size-asian="11pt" style:font-size-complex="11pt"/>
    </style:style>
    <style:style style:name="P20" style:family="paragraph" style:parent-style-name="Heading_20_4">
      <style:text-properties style:use-window-font-color="true" loext:opacity="0%" style:font-name="Arial1" fo:font-size="11pt" style:font-size-asian="11pt" style:font-size-complex="11pt"/>
    </style:style>
    <style:style style:name="P21" style:family="paragraph" style:parent-style-name="Text_20_body">
      <style:text-properties style:use-window-font-color="true" loext:opacity="0%" style:font-name="Arial1" fo:font-size="11pt" officeooo:paragraph-rsid="003098fe" style:font-size-asian="11pt" style:font-size-complex="11pt"/>
    </style:style>
    <style:style style:name="P22" style:family="paragraph" style:parent-style-name="Standard">
      <style:paragraph-properties fo:text-align="start" style:justify-single-word="false"/>
      <style:text-properties style:use-window-font-color="true" loext:opacity="0%" style:font-name="Arial1" fo:font-size="11pt" officeooo:paragraph-rsid="003098fe" style:font-size-asian="11pt" style:font-size-complex="11pt"/>
    </style:style>
    <style:style style:name="P23" style:family="paragraph" style:parent-style-name="Heading_20_4">
      <style:text-properties style:use-window-font-color="true" loext:opacity="0%" style:font-name="Arial1" fo:font-size="11pt" fo:font-weight="bold" style:font-size-asian="11pt" style:font-size-complex="11pt"/>
    </style:style>
    <style:style style:name="P24" style:family="paragraph" style:parent-style-name="Text_20_body">
      <style:text-properties style:use-window-font-color="true" loext:opacity="0%" style:font-name="Arial1" fo:font-size="11pt" officeooo:paragraph-rsid="003103ca" style:font-size-asian="11pt" style:font-size-complex="11pt"/>
    </style:style>
    <style:style style:name="P25" style:family="paragraph" style:parent-style-name="Text_20_body">
      <style:text-properties style:font-name="Arial1" fo:font-size="11pt" officeooo:paragraph-rsid="003103ca" style:font-size-asian="11pt" style:font-size-complex="11pt"/>
    </style:style>
    <style:style style:name="P26" style:family="paragraph" style:parent-style-name="Text_20_body">
      <style:text-properties officeooo:paragraph-rsid="003103ca"/>
    </style:style>
    <style:style style:name="P27" style:family="paragraph" style:parent-style-name="Text_20_body">
      <style:text-properties officeooo:rsid="00332758" officeooo:paragraph-rsid="00332758"/>
    </style:style>
    <style:style style:name="P28" style:family="paragraph" style:parent-style-name="Heading_20_4">
      <style:text-properties style:font-name="Arial1" fo:font-size="11pt" fo:font-weight="bold" style:font-size-asian="11pt" style:font-size-complex="11pt"/>
    </style:style>
    <style:style style:name="P29" style:family="paragraph" style:parent-style-name="Text_20_body">
      <style:text-properties style:font-name="Arial1" fo:font-size="11pt" officeooo:paragraph-rsid="0032029f" style:font-size-asian="11pt" style:font-size-complex="11pt"/>
    </style:style>
    <style:style style:name="P30" style:family="paragraph" style:parent-style-name="Text_20_body">
      <style:text-properties style:font-name="Arial1" fo:font-size="11pt" officeooo:paragraph-rsid="00332758" style:font-size-asian="11pt" style:font-size-complex="11pt"/>
    </style:style>
    <style:style style:name="P31" style:family="paragraph" style:parent-style-name="Heading_20_4">
      <style:text-properties style:font-name="Arial1" fo:font-size="11pt" fo:font-weight="bold" officeooo:paragraph-rsid="0033109c" style:font-size-asian="11pt" style:font-size-complex="11pt"/>
    </style:style>
    <style:style style:name="P32" style:family="paragraph" style:parent-style-name="Text_20_body">
      <style:text-properties officeooo:paragraph-rsid="0033109c"/>
    </style:style>
    <style:style style:name="P33" style:family="paragraph" style:parent-style-name="Heading_20_4">
      <style:paragraph-properties fo:text-align="start" style:justify-single-word="false"/>
      <style:text-properties style:use-window-font-color="true" loext:opacity="0%" style:font-name="Arial1" fo:font-size="11pt" fo:font-weight="bold" officeooo:paragraph-rsid="003098fe" style:font-size-asian="11pt" style:font-size-complex="11pt"/>
    </style:style>
    <style:style style:name="P34" style:family="paragraph" style:parent-style-name="Text_20_body">
      <style:text-properties officeooo:paragraph-rsid="0034aa6d"/>
    </style:style>
    <style:style style:name="P35" style:family="paragraph" style:parent-style-name="Text_20_body">
      <style:text-properties style:font-name="Arial1" fo:font-size="11pt" officeooo:paragraph-rsid="0034aa6d" style:font-size-asian="11pt" style:font-size-complex="11pt"/>
    </style:style>
    <style:style style:name="P36" style:family="paragraph" style:parent-style-name="Heading_20_4">
      <style:paragraph-properties fo:text-align="start" style:justify-single-word="false"/>
      <style:text-properties style:font-name="Arial1" fo:font-size="11pt" fo:font-weight="bold" officeooo:paragraph-rsid="001fc37c" style:font-size-asian="11pt" style:font-size-complex="11pt"/>
    </style:style>
    <style:style style:name="P37" style:family="paragraph" style:parent-style-name="Text_20_body">
      <style:text-properties style:font-name="Arial1" fo:font-size="11pt" officeooo:paragraph-rsid="00354f2d" style:font-size-asian="11pt" style:font-size-complex="11pt"/>
    </style:style>
    <style:style style:name="P38" style:family="paragraph" style:parent-style-name="Text_20_body">
      <style:text-properties officeooo:paragraph-rsid="00354f2d"/>
    </style:style>
    <style:style style:name="P39" style:family="paragraph" style:parent-style-name="Standard">
      <style:paragraph-properties fo:text-align="start" style:justify-single-word="false"/>
      <style:text-properties style:font-name="Arial1" fo:font-size="11pt" officeooo:paragraph-rsid="001fc37c" style:font-size-asian="11pt" style:font-size-complex="11pt"/>
    </style:style>
    <style:style style:name="P40" style:family="paragraph" style:parent-style-name="Heading_20_4">
      <style:paragraph-properties fo:text-align="start" style:justify-single-word="false"/>
      <style:text-properties style:font-name="Arial1" fo:font-size="11pt" fo:font-weight="bold" style:font-size-asian="11pt" style:font-size-complex="11pt"/>
    </style:style>
    <style:style style:name="P41" style:family="paragraph" style:parent-style-name="Text_20_body">
      <style:text-properties officeooo:paragraph-rsid="00361a5d"/>
    </style:style>
    <style:style style:name="P42" style:family="paragraph" style:parent-style-name="Standard" style:list-style-name="L1">
      <style:paragraph-properties fo:text-align="start" style:justify-single-word="false"/>
    </style:style>
    <style:style style:name="P43" style:family="paragraph" style:parent-style-name="Standard">
      <style:paragraph-properties fo:text-align="start" style:justify-single-word="false"/>
      <style:text-properties style:use-window-font-color="true" loext:opacity="0%" style:font-name="Arial2" officeooo:paragraph-rsid="002577e0"/>
    </style:style>
    <style:style style:name="P44" style:family="paragraph" style:parent-style-name="Standard">
      <style:paragraph-properties fo:text-align="start" style:justify-single-word="false"/>
      <style:text-properties style:use-window-font-color="true" loext:opacity="0%" style:font-name="Arial2" officeooo:paragraph-rsid="00294e15"/>
    </style:style>
    <style:style style:name="P45" style:family="paragraph" style:parent-style-name="Standard">
      <style:paragraph-properties fo:text-align="start" style:justify-single-word="false"/>
      <style:text-properties style:use-window-font-color="true" loext:opacity="0%" style:font-name="Arial2" fo:font-size="11pt" officeooo:paragraph-rsid="00294e15" style:font-size-asian="11pt" style:font-size-complex="11pt"/>
    </style:style>
    <style:style style:name="P46" style:family="paragraph" style:parent-style-name="Standard">
      <style:paragraph-properties fo:text-align="start" style:justify-single-word="false"/>
      <style:text-properties style:font-name="Arial1" fo:font-size="11pt" officeooo:paragraph-rsid="00294e15" style:font-size-asian="11pt" style:font-size-complex="11pt"/>
    </style:style>
    <style:style style:name="P47" style:family="paragraph" style:parent-style-name="Heading_20_4">
      <style:paragraph-properties fo:margin-left="0cm" fo:margin-right="0cm" fo:margin-top="0cm" fo:margin-bottom="0.212cm" style:contextual-spacing="false" fo:line-height="114%" fo:text-indent="0cm" style:auto-text-indent="false"/>
      <style:text-properties style:font-name="Arial1" fo:font-size="11pt" fo:font-weight="bold" style:font-size-asian="11pt" style:font-size-complex="11pt"/>
    </style:style>
    <style:style style:name="P48" style:family="paragraph" style:parent-style-name="Text_20_body">
      <style:paragraph-properties fo:margin-left="0cm" fo:margin-right="0cm" fo:margin-top="0cm" fo:margin-bottom="0.247cm" style:contextual-spacing="false" fo:line-height="114%" fo:text-indent="0cm" style:auto-text-indent="false"/>
      <style:text-properties officeooo:paragraph-rsid="00380536"/>
    </style:style>
    <style:style style:name="P49" style:family="paragraph" style:parent-style-name="Text_20_body">
      <style:paragraph-properties fo:margin-left="0cm" fo:margin-right="0cm" fo:margin-top="0cm" fo:margin-bottom="0.247cm" style:contextual-spacing="false" fo:line-height="114%" fo:text-indent="0cm" style:auto-text-indent="false"/>
    </style:style>
    <style:style style:name="P50" style:family="paragraph" style:parent-style-name="Text_20_body">
      <style:paragraph-properties fo:margin-left="0cm" fo:margin-right="0cm" fo:margin-top="0cm" fo:margin-bottom="0.247cm" style:contextual-spacing="false" fo:line-height="114%" fo:text-indent="0cm" style:auto-text-indent="false"/>
      <style:text-properties officeooo:paragraph-rsid="003a27af"/>
    </style:style>
    <style:style style:name="P51" style:family="paragraph" style:parent-style-name="Text_20_body">
      <style:paragraph-properties fo:margin-left="0cm" fo:margin-right="0cm" fo:margin-top="0cm" fo:margin-bottom="0.247cm" style:contextual-spacing="false" fo:line-height="114%" fo:text-indent="0cm" style:auto-text-indent="false"/>
      <style:text-properties style:font-name="Arial1" fo:font-size="11pt" style:font-size-asian="11pt" style:font-size-complex="11pt"/>
    </style:style>
    <style:style style:name="P52" style:family="paragraph" style:parent-style-name="Text_20_body">
      <style:paragraph-properties fo:margin-left="0cm" fo:margin-right="0cm" fo:margin-top="0cm" fo:margin-bottom="0.247cm" style:contextual-spacing="false" fo:line-height="114%" fo:text-indent="0cm" style:auto-text-indent="false" fo:padding="0cm" fo:border="none"/>
      <style:text-properties style:font-name="Arial1" fo:font-size="11pt" fo:font-weight="normal" officeooo:rsid="003a27af" officeooo:paragraph-rsid="003a27af" style:font-size-asian="11pt" style:font-weight-asian="normal" style:font-size-complex="11pt" style:font-weight-complex="normal"/>
    </style:style>
    <style:style style:name="P53" style:family="paragraph" style:parent-style-name="Text_20_body">
      <style:paragraph-properties fo:margin-left="0cm" fo:margin-right="0cm" fo:margin-top="0cm" fo:margin-bottom="0.247cm" style:contextual-spacing="false" fo:line-height="114%" fo:text-indent="0cm" style:auto-text-indent="false" fo:padding="0cm" fo:border="none"/>
      <style:text-properties officeooo:paragraph-rsid="003a27af"/>
    </style:style>
    <style:style style:name="P54" style:family="paragraph" style:parent-style-name="Text_20_body">
      <style:paragraph-properties fo:margin-left="0cm" fo:margin-right="0cm" fo:margin-top="0cm" fo:margin-bottom="0.247cm" style:contextual-spacing="false" fo:line-height="114%" fo:text-indent="0cm" style:auto-text-indent="false" fo:padding="0cm" fo:border="none"/>
      <style:text-properties style:font-name="Arial1" fo:font-size="11pt" officeooo:paragraph-rsid="003a27af" style:font-size-asian="11pt" style:font-size-complex="11pt"/>
    </style:style>
    <style:style style:name="P55" style:family="paragraph" style:parent-style-name="Text_20_body">
      <style:paragraph-properties fo:margin-left="0cm" fo:margin-right="0cm" fo:margin-top="0cm" fo:margin-bottom="0.247cm" style:contextual-spacing="false" fo:line-height="114%" fo:text-indent="0cm" style:auto-text-indent="false" fo:padding="0cm" fo:border="none"/>
      <style:text-properties style:font-name="Arial1" fo:font-size="11pt" fo:font-weight="normal" officeooo:paragraph-rsid="003a27af" style:font-size-asian="11pt" style:font-weight-asian="normal" style:font-size-complex="11pt" style:font-weight-complex="normal"/>
    </style:style>
    <style:style style:name="P56" style:family="paragraph" style:parent-style-name="Text_20_body">
      <style:paragraph-properties fo:margin-left="0cm" fo:margin-right="0cm" fo:margin-top="0cm" fo:margin-bottom="0.247cm" style:contextual-spacing="false" fo:line-height="114%" fo:text-indent="0cm" style:auto-text-indent="false" fo:padding="0cm" fo:border="none"/>
      <style:text-properties style:font-name="Arial1" fo:font-size="11pt" fo:font-weight="bold" officeooo:rsid="0046d5f5" officeooo:paragraph-rsid="0046d5f5" style:font-size-asian="11pt" style:font-weight-asian="bold" style:font-size-complex="11pt" style:font-weight-complex="bold"/>
    </style:style>
    <style:style style:name="P57" style:family="paragraph" style:parent-style-name="Standard">
      <style:paragraph-properties fo:text-align="start" style:justify-single-word="false"/>
      <style:text-properties officeooo:paragraph-rsid="0046d5f5"/>
    </style:style>
    <style:style style:name="P58" style:family="paragraph" style:parent-style-name="Standard">
      <style:paragraph-properties fo:text-align="start" style:justify-single-word="false"/>
      <style:text-properties style:use-window-font-color="true" loext:opacity="0%" style:font-name="Arial1" fo:font-size="11pt" officeooo:paragraph-rsid="00294e15" style:font-size-asian="11pt" style:font-size-complex="11pt"/>
    </style:style>
    <style:style style:name="P59" style:family="paragraph" style:parent-style-name="Standard">
      <style:paragraph-properties fo:text-align="start" style:justify-single-word="false"/>
      <style:text-properties style:use-window-font-color="true" loext:opacity="0%" style:font-name="Arial1" fo:font-size="11pt" style:font-size-asian="11pt" style:font-size-complex="11pt"/>
    </style:style>
    <style:style style:name="P60" style:family="paragraph" style:parent-style-name="Standard">
      <style:paragraph-properties fo:text-align="start" style:justify-single-word="false"/>
      <style:text-properties style:use-window-font-color="true" loext:opacity="0%" style:font-name="Arial2" officeooo:rsid="00299804" officeooo:paragraph-rsid="00299804"/>
    </style:style>
    <style:style style:name="P61" style:family="paragraph" style:parent-style-name="Standard">
      <style:paragraph-properties fo:text-align="start" style:justify-single-word="false"/>
      <style:text-properties style:use-window-font-color="true" loext:opacity="0%" style:font-name="Arial2" fo:font-size="11pt" officeooo:paragraph-rsid="00299804" style:font-size-asian="11pt" style:font-size-complex="11pt"/>
    </style:style>
    <style:style style:name="P62" style:family="paragraph" style:parent-style-name="Heading_20_2">
      <style:paragraph-properties fo:text-align="start" style:justify-single-word="false"/>
      <style:text-properties style:use-window-font-color="true" loext:opacity="0%" style:font-name="Arial1" fo:font-size="11pt" officeooo:paragraph-rsid="00299804" style:font-size-asian="11pt" style:font-size-complex="11pt"/>
    </style:style>
    <style:style style:name="P63" style:family="paragraph" style:parent-style-name="Text_20_body">
      <style:paragraph-properties fo:margin-left="0cm" fo:margin-right="0cm" fo:margin-top="0cm" fo:margin-bottom="0.247cm" style:contextual-spacing="false" fo:line-height="114%" fo:text-indent="0cm" style:auto-text-indent="false"/>
      <style:text-properties style:font-name="Arial1" fo:font-size="11pt" officeooo:paragraph-rsid="00412b61" style:font-size-asian="11pt" style:font-size-complex="11pt"/>
    </style:style>
    <style:style style:name="P64" style:family="paragraph" style:parent-style-name="Text_20_body">
      <style:paragraph-properties fo:margin-left="0cm" fo:margin-right="0cm" fo:margin-top="0cm" fo:margin-bottom="0.247cm" style:contextual-spacing="false" fo:line-height="114%" fo:text-indent="0cm" style:auto-text-indent="false"/>
      <style:text-properties officeooo:paragraph-rsid="00412b61"/>
    </style:style>
    <style:style style:name="P65" style:family="paragraph" style:parent-style-name="Text_20_body">
      <style:paragraph-properties fo:margin-left="0cm" fo:margin-right="0cm" fo:margin-top="0cm" fo:margin-bottom="0.247cm" style:contextual-spacing="false" fo:line-height="114%" fo:text-indent="0cm" style:auto-text-indent="false"/>
      <style:text-properties style:font-name="Arial1" fo:font-size="11pt" officeooo:paragraph-rsid="0047db78" style:font-size-asian="11pt" style:font-size-complex="11pt"/>
    </style:style>
    <style:style style:name="P66" style:family="paragraph" style:parent-style-name="Heading_20_2">
      <style:paragraph-properties fo:margin-left="0cm" fo:margin-right="0cm" fo:margin-top="0cm" fo:margin-bottom="0.247cm" style:contextual-spacing="false" fo:line-height="114%" fo:text-indent="0cm" style:auto-text-indent="false"/>
      <style:text-properties style:font-name="Arial1" fo:font-size="11pt" style:font-size-asian="11pt" style:font-size-complex="11pt"/>
    </style:style>
    <style:style style:name="P67" style:family="paragraph" style:parent-style-name="Text_20_body">
      <style:paragraph-properties fo:margin-left="0cm" fo:margin-right="0cm" fo:margin-top="0cm" fo:margin-bottom="0.247cm" style:contextual-spacing="false" fo:line-height="114%" fo:text-indent="0cm" style:auto-text-indent="false"/>
      <style:text-properties officeooo:paragraph-rsid="00426560"/>
    </style:style>
    <style:style style:name="P68" style:family="paragraph" style:parent-style-name="Text_20_body">
      <style:paragraph-properties fo:margin-left="0cm" fo:margin-right="0cm" fo:margin-top="0cm" fo:margin-bottom="0.247cm" style:contextual-spacing="false" fo:line-height="114%" fo:text-indent="0cm" style:auto-text-indent="false"/>
      <style:text-properties style:font-name="Arial1" fo:font-size="11pt" officeooo:paragraph-rsid="00426560" style:font-size-asian="11pt" style:font-size-complex="11pt"/>
    </style:style>
    <style:style style:name="P69" style:family="paragraph" style:parent-style-name="Text_20_body">
      <style:paragraph-properties fo:margin-left="0cm" fo:margin-right="0cm" fo:margin-top="0cm" fo:margin-bottom="0.247cm" style:contextual-spacing="false" fo:line-height="114%" fo:text-indent="0cm" style:auto-text-indent="false"/>
      <style:text-properties officeooo:paragraph-rsid="00481faa"/>
    </style:style>
    <style:style style:name="P70" style:family="paragraph" style:parent-style-name="Standard">
      <style:paragraph-properties fo:text-align="start" style:justify-single-word="false"/>
      <style:text-properties style:use-window-font-color="true" loext:opacity="0%" style:font-name="Arial2" officeooo:paragraph-rsid="003f4ff9"/>
    </style:style>
    <style:style style:name="P71" style:family="paragraph" style:parent-style-name="Standard">
      <style:paragraph-properties fo:text-align="start" style:justify-single-word="false"/>
      <style:text-properties style:use-window-font-color="true" loext:opacity="0%" style:font-name="Arial1" fo:font-size="11pt" officeooo:paragraph-rsid="003f4ff9" style:font-size-asian="11pt" style:font-size-complex="11pt"/>
    </style:style>
    <style:style style:name="P72" style:family="paragraph" style:parent-style-name="Standard">
      <style:paragraph-properties fo:text-align="start" style:justify-single-word="false"/>
      <style:text-properties style:use-window-font-color="true" loext:opacity="0%" style:font-name="Arial1" fo:font-size="11pt" officeooo:paragraph-rsid="002ac422" style:font-size-asian="11pt" style:font-size-complex="11pt"/>
    </style:style>
    <style:style style:name="P73" style:family="paragraph" style:parent-style-name="Text_20_body">
      <style:paragraph-properties fo:margin-left="0cm" fo:margin-right="0cm" fo:margin-top="0cm" fo:margin-bottom="0.247cm" style:contextual-spacing="false" fo:line-height="114%" fo:text-indent="0cm" style:auto-text-indent="false">
        <style:tab-stops>
          <style:tab-stop style:position="4.113cm"/>
        </style:tab-stops>
      </style:paragraph-properties>
      <style:text-properties style:font-name="Arial1" fo:font-size="11pt" style:font-size-asian="11pt" style:font-size-complex="11pt"/>
    </style:style>
    <style:style style:name="P74" style:family="paragraph" style:parent-style-name="Text_20_body">
      <style:paragraph-properties fo:margin-left="0cm" fo:margin-right="0cm" fo:margin-top="0cm" fo:margin-bottom="0.247cm" style:contextual-spacing="false" fo:line-height="114%" fo:text-indent="0cm" style:auto-text-indent="false"/>
      <style:text-properties officeooo:paragraph-rsid="0049ed8f"/>
    </style:style>
    <style:style style:name="P75" style:family="paragraph" style:parent-style-name="Text_20_body">
      <style:paragraph-properties fo:margin-left="0cm" fo:margin-right="0cm" fo:margin-top="0cm" fo:margin-bottom="0.247cm" style:contextual-spacing="false" fo:line-height="114%" fo:text-indent="0cm" style:auto-text-indent="false"/>
      <style:text-properties style:font-name="Arial1" fo:font-size="11pt" fo:font-style="normal" style:font-size-asian="11pt" style:font-style-asian="normal" style:font-size-complex="11pt" style:font-style-complex="normal"/>
    </style:style>
    <style:style style:name="P76" style:family="paragraph" style:parent-style-name="Text_20_body">
      <style:paragraph-properties fo:margin-left="0cm" fo:margin-right="0cm" fo:margin-top="0cm" fo:margin-bottom="0.247cm" style:contextual-spacing="false" fo:line-height="114%" fo:text-indent="0cm" style:auto-text-indent="false"/>
      <style:text-properties officeooo:paragraph-rsid="0044b8ab"/>
    </style:style>
    <style:style style:name="P77" style:family="paragraph" style:parent-style-name="Text_20_body">
      <style:paragraph-properties fo:margin-left="0cm" fo:margin-right="0cm" fo:margin-top="0cm" fo:margin-bottom="0.247cm" style:contextual-spacing="false" fo:line-height="114%" fo:text-indent="0cm" style:auto-text-indent="false"/>
      <style:text-properties style:font-name="Arial1" fo:font-size="11pt" officeooo:paragraph-rsid="0044b8ab" style:font-size-asian="11pt" style:font-size-complex="11pt"/>
    </style:style>
    <style:style style:name="P78" style:family="paragraph" style:parent-style-name="Text_20_body">
      <style:paragraph-properties fo:margin-left="0cm" fo:margin-right="0cm" fo:margin-top="0cm" fo:margin-bottom="0.247cm" style:contextual-spacing="false" fo:line-height="114%" fo:text-indent="0cm" style:auto-text-indent="false"/>
      <style:text-properties style:font-name="Arial1" fo:font-size="11pt" fo:font-style="normal" officeooo:paragraph-rsid="004b1423" style:font-size-asian="11pt" style:font-style-asian="normal" style:font-size-complex="11pt" style:font-style-complex="normal"/>
    </style:style>
    <style:style style:name="P79" style:family="paragraph" style:parent-style-name="Text_20_body">
      <style:paragraph-properties fo:margin-left="0cm" fo:margin-right="0cm" fo:margin-top="0cm" fo:margin-bottom="0.247cm" style:contextual-spacing="false" fo:line-height="114%" fo:text-indent="0cm" style:auto-text-indent="false"/>
      <style:text-properties officeooo:paragraph-rsid="004b1423"/>
    </style:style>
    <style:style style:name="P80" style:family="paragraph" style:parent-style-name="Text_20_body">
      <style:paragraph-properties fo:margin-left="0cm" fo:margin-right="0cm" fo:margin-top="0cm" fo:margin-bottom="0.247cm" style:contextual-spacing="false" fo:line-height="114%" fo:text-indent="0cm" style:auto-text-indent="false"/>
      <style:text-properties officeooo:paragraph-rsid="004ca87d"/>
    </style:style>
    <style:style style:name="P81" style:family="paragraph" style:parent-style-name="Text_20_body">
      <style:paragraph-properties fo:margin-left="0cm" fo:margin-right="0cm" fo:margin-top="0cm" fo:margin-bottom="0.247cm" style:contextual-spacing="false" fo:line-height="114%" fo:text-indent="0cm" style:auto-text-indent="false"/>
      <style:text-properties officeooo:paragraph-rsid="004d0f36"/>
    </style:style>
    <style:style style:name="P82" style:family="paragraph" style:parent-style-name="Text_20_body" style:list-style-name="L2">
      <style:paragraph-properties fo:margin-left="0cm" fo:margin-right="0cm" fo:margin-top="0cm" fo:margin-bottom="0.247cm" style:contextual-spacing="false" fo:line-height="114%" fo:text-indent="0cm" style:auto-text-indent="false" fo:padding="0cm" fo:border="none"/>
    </style:style>
    <style:style style:name="P83" style:family="paragraph" style:parent-style-name="Text_20_body" style:list-style-name="L2">
      <style:paragraph-properties fo:margin-left="0cm" fo:margin-right="0cm" fo:margin-top="0cm" fo:margin-bottom="0.247cm" style:contextual-spacing="false" fo:line-height="114%" fo:text-indent="0cm" style:auto-text-indent="false" fo:padding="0cm" fo:border="none"/>
      <style:text-properties officeooo:paragraph-rsid="004ffce7"/>
    </style:style>
    <style:style style:name="P84" style:family="paragraph" style:parent-style-name="Text_20_body">
      <style:paragraph-properties fo:margin-left="0cm" fo:margin-right="0cm" fo:margin-top="0cm" fo:margin-bottom="0.247cm" style:contextual-spacing="false" fo:line-height="114%" fo:text-indent="0cm" style:auto-text-indent="false" fo:padding="0cm" fo:border="none"/>
      <style:text-properties officeooo:paragraph-rsid="004ffce7"/>
    </style:style>
    <style:style style:name="P85" style:family="paragraph" style:parent-style-name="Standard">
      <style:paragraph-properties fo:text-align="start" style:justify-single-word="false"/>
      <style:text-properties style:use-window-font-color="true" loext:opacity="0%" style:font-name="Arial2" officeooo:rsid="002dfedd" officeooo:paragraph-rsid="002dfedd"/>
    </style:style>
    <style:style style:name="P86" style:family="paragraph" style:parent-style-name="Standard">
      <style:paragraph-properties fo:text-align="start" style:justify-single-word="false"/>
      <style:text-properties style:use-window-font-color="true" loext:opacity="0%" style:font-name="Arial2" fo:font-weight="bold" officeooo:rsid="002c42ef" officeooo:paragraph-rsid="002c42ef" style:font-weight-asian="bold" style:font-weight-complex="bold"/>
    </style:style>
    <style:style style:name="P87" style:family="paragraph" style:parent-style-name="Standard">
      <style:paragraph-properties fo:text-align="start" style:justify-single-word="false"/>
      <style:text-properties style:use-window-font-color="true" loext:opacity="0%" style:font-name="Arial2" fo:font-size="11pt" officeooo:paragraph-rsid="005007f3" style:font-size-asian="11pt" style:font-size-complex="11pt"/>
    </style:style>
    <style:style style:name="P88" style:family="paragraph" style:parent-style-name="Default">
      <style:paragraph-properties fo:text-align="start" style:justify-single-word="false"/>
      <style:text-properties style:use-window-font-color="true" loext:opacity="0%" style:font-name="Arial2" fo:font-size="11pt" style:font-size-asian="11pt" style:font-size-complex="11pt"/>
    </style:style>
    <style:style style:name="T1" style:family="text">
      <style:text-properties style:text-line-through-style="none" style:text-line-through-type="none" fo:font-size="20pt" style:text-underline-style="none" fo:font-weight="normal" style:font-size-asian="20pt" style:font-weight-asian="normal"/>
    </style:style>
    <style:style style:name="T2" style:family="text">
      <style:text-properties fo:font-size="20pt" fo:font-weight="bold" style:font-size-asian="20pt" style:font-weight-asian="bold"/>
    </style:style>
    <style:style style:name="T3" style:family="text">
      <style:text-properties style:text-line-through-style="none" style:text-line-through-type="none" fo:font-size="20pt" style:text-underline-style="none" fo:font-weight="bold" style:font-size-asian="20pt" style:font-weight-asian="bold"/>
    </style:style>
    <style:style style:name="T4" style:family="text">
      <style:text-properties style:text-line-through-style="none" style:text-line-through-type="none" fo:font-size="20pt" style:text-underline-style="none" fo:font-weight="bold" officeooo:rsid="001b9a16" style:font-size-asian="20pt" style:font-weight-asian="bold"/>
    </style:style>
    <style:style style:name="T5" style:family="text">
      <style:text-properties style:text-line-through-style="none" style:text-line-through-type="none" fo:font-size="28pt" style:text-underline-style="none" fo:font-weight="normal" style:font-size-asian="28pt" style:font-weight-asian="normal"/>
    </style:style>
    <style:style style:name="T6" style:family="text">
      <style:text-properties style:text-line-through-style="none" style:text-line-through-type="none" fo:font-size="28pt" style:text-underline-style="none" fo:font-weight="bold" style:font-size-asian="28pt" style:font-weight-asian="bold"/>
    </style:style>
    <style:style style:name="T7" style:family="text">
      <style:text-properties style:text-line-through-style="none" style:text-line-through-type="none" fo:font-size="15pt" style:text-underline-style="none" fo:font-weight="normal" style:font-size-asian="15pt" style:font-weight-asian="normal"/>
    </style:style>
    <style:style style:name="T8" style:family="text">
      <style:text-properties style:text-line-through-style="none" style:text-line-through-type="none" fo:font-size="15pt" style:text-underline-style="none" fo:font-weight="bold" officeooo:rsid="001b9a16" style:font-size-asian="15pt" style:font-weight-asian="bold"/>
    </style:style>
    <style:style style:name="T9" style:family="text">
      <style:text-properties style:text-line-through-style="none" style:text-line-through-type="none" fo:font-size="15pt" style:text-underline-style="none" fo:font-weight="bold" style:font-size-asian="15pt" style:font-weight-asian="bold"/>
    </style:style>
    <style:style style:name="T10" style:family="text">
      <style:text-properties fo:font-size="14pt" fo:font-weight="normal" style:font-size-asian="14pt" style:font-weight-asian="normal"/>
    </style:style>
    <style:style style:name="T11" style:family="text">
      <style:text-properties fo:font-size="14pt" fo:font-weight="bold" style:font-size-asian="14pt" style:font-weight-asian="bold"/>
    </style:style>
    <style:style style:name="T12" style:family="text">
      <style:text-properties style:text-line-through-style="none" style:text-line-through-type="none" fo:font-size="11.5pt" style:text-underline-style="none" fo:font-weight="normal" style:font-size-asian="11.5pt" style:font-weight-asian="normal" style:font-weight-complex="normal"/>
    </style:style>
    <style:style style:name="T13" style:family="text">
      <style:text-properties style:text-line-through-style="none" style:text-line-through-type="none" fo:font-size="11pt" style:text-underline-style="none" fo:font-weight="normal" style:font-size-asian="11pt" style:font-weight-asian="normal" style:font-size-complex="11pt" style:font-weight-complex="normal"/>
    </style:style>
    <style:style style:name="T14" style:family="text">
      <style:text-properties style:text-line-through-style="none" style:text-line-through-type="none" fo:font-size="11pt" style:text-underline-style="none" fo:font-weight="normal" officeooo:rsid="001cd7e1" style:font-size-asian="11pt" style:font-weight-asian="normal" style:font-size-complex="11pt" style:font-weight-complex="normal"/>
    </style:style>
    <style:style style:name="T15" style:family="text">
      <style:text-properties fo:font-size="11pt" style:font-size-asian="11pt" style:font-size-complex="11pt"/>
    </style:style>
    <style:style style:name="T16" style:family="text">
      <style:text-properties fo:font-size="11pt" officeooo:rsid="001cd7e1" style:font-size-asian="11pt" style:font-size-complex="11pt"/>
    </style:style>
    <style:style style:name="T17" style:family="text">
      <style:text-properties fo:font-size="11pt" officeooo:rsid="001d02f2" style:font-size-asian="11pt" style:font-size-complex="11pt"/>
    </style:style>
    <style:style style:name="T18" style:family="text">
      <style:text-properties fo:color="#333333" loext:opacity="100%" style:font-name="Liberation-Sans" fo:font-size="11pt" style:font-size-asian="11pt"/>
    </style:style>
    <style:style style:name="T19" style:family="text">
      <style:text-properties officeooo:rsid="001d02f2"/>
    </style:style>
    <style:style style:name="T20" style:family="text">
      <style:text-properties fo:font-style="normal" style:font-style-asian="normal" style:font-style-complex="normal"/>
    </style:style>
    <style:style style:name="T21" style:family="text">
      <style:text-properties fo:font-style="italic" style:font-style-asian="italic"/>
    </style:style>
    <style:style style:name="T22" style:family="text">
      <style:text-properties fo:font-size="11pt" style:font-size-asian="11pt"/>
    </style:style>
    <style:style style:name="T23" style:family="text">
      <style:text-properties fo:color="#1a365d" loext:opacity="100%" style:font-name="Liberation-Sans-Bold" fo:font-size="14pt" fo:font-weight="bold" style:font-size-asian="14pt" style:font-weight-asian="bold"/>
    </style:style>
    <style:style style:name="T24" style:family="text">
      <style:text-properties fo:color="#2b6cb1" loext:opacity="100%" style:font-name="Liberation-Sans-Bold" fo:font-size="12pt" fo:font-weight="bold" style:font-size-asian="12pt" style:font-weight-asian="bold"/>
    </style:style>
    <style:style style:name="T25" style:family="text">
      <style:text-properties fo:font-size="12pt" fo:font-weight="bold" style:font-size-asian="12pt" style:font-weight-asian="bold"/>
    </style:style>
    <style:style style:name="T26" style:family="text">
      <style:text-properties fo:font-size="11pt" fo:font-weight="bold" style:font-size-asian="11pt" style:font-weight-asian="bold"/>
    </style:style>
    <style:style style:name="T27" style:family="text">
      <style:text-properties fo:font-size="11pt" officeooo:rsid="002eb815" style:font-size-asian="11pt"/>
    </style:style>
    <style:style style:name="T28" style:family="text">
      <style:text-properties style:use-window-font-color="true" loext:opacity="0%" style:font-name="Arial1" fo:font-size="11pt" fo:font-weight="normal" style:font-size-asian="11pt" style:font-weight-asian="normal" style:font-weight-complex="normal"/>
    </style:style>
    <style:style style:name="T29" style:family="text">
      <style:text-properties style:font-name="Arial1" fo:font-size="11pt" fo:font-weight="normal" officeooo:rsid="002eb815" style:font-size-asian="11pt" style:font-weight-asian="normal" style:font-size-complex="11pt" style:font-weight-complex="normal"/>
    </style:style>
    <style:style style:name="T30" style:family="text">
      <style:text-properties style:font-name="Arial1" fo:font-size="11pt" fo:font-weight="normal" style:font-size-asian="11pt" style:font-weight-asian="normal" style:font-size-complex="11pt" style:font-weight-complex="normal"/>
    </style:style>
    <style:style style:name="T31" style:family="text">
      <style:text-properties style:font-name="Arial1" fo:font-size="11pt" fo:font-weight="normal" officeooo:rsid="002f1ca2" style:font-size-asian="11pt" style:font-weight-asian="normal" style:font-size-complex="11pt" style:font-weight-complex="normal"/>
    </style:style>
    <style:style style:name="T32" style:family="text">
      <style:text-properties style:font-name="Arial1" fo:font-size="11pt" style:font-size-asian="11pt" style:font-size-complex="11pt"/>
    </style:style>
    <style:style style:name="T33" style:family="text">
      <style:text-properties style:use-window-font-color="true" loext:opacity="0%" style:font-name="Arial1" fo:font-size="11pt" fo:font-weight="normal" officeooo:rsid="002f1ca2" style:font-size-asian="11pt" style:font-weight-asian="normal" style:font-size-complex="11pt" style:font-weight-complex="normal"/>
    </style:style>
    <style:style style:name="T34" style:family="text">
      <style:text-properties officeooo:rsid="002eb815"/>
    </style:style>
    <style:style style:name="T35" style:family="text">
      <style:text-properties style:font-name="Arial1" fo:font-size="11pt" officeooo:rsid="002eb815" style:font-size-asian="11pt" style:font-size-complex="11pt"/>
    </style:style>
    <style:style style:name="T36" style:family="text">
      <style:text-properties style:font-name="Arial1" fo:font-size="11pt" officeooo:rsid="002ebd85" style:font-size-asian="11pt" style:font-size-complex="11pt"/>
    </style:style>
    <style:style style:name="T37" style:family="text">
      <style:text-properties style:font-name="Arial1" fo:font-size="11pt" fo:font-weight="bold" officeooo:rsid="002ebd85" style:font-size-asian="11pt" style:font-size-complex="11pt"/>
    </style:style>
    <style:style style:name="T38" style:family="text">
      <style:text-properties style:font-name="Arial1" fo:font-size="11pt" fo:font-weight="normal" officeooo:rsid="002ebd85" style:font-size-asian="11pt" style:font-weight-asian="normal" style:font-size-complex="11pt" style:font-weight-complex="normal"/>
    </style:style>
    <style:style style:name="T39" style:family="text">
      <style:text-properties style:use-window-font-color="true" loext:opacity="0%" style:font-name="Arial1" fo:font-size="11pt" fo:font-weight="normal" style:font-size-asian="11pt" style:font-weight-asian="normal" style:font-size-complex="11pt" style:font-weight-complex="normal"/>
    </style:style>
    <style:style style:name="T40" style:family="text">
      <style:text-properties style:use-window-font-color="true" loext:opacity="0%" style:font-name="Arial1" fo:font-size="11pt" style:font-size-asian="11pt" style:font-size-complex="11pt"/>
    </style:style>
    <style:style style:name="T41" style:family="text">
      <style:text-properties style:use-window-font-color="true" loext:opacity="0%" style:font-name="Arial1" fo:font-size="11pt" fo:font-style="normal" style:font-size-asian="11pt" style:font-style-asian="normal" style:font-size-complex="11pt" style:font-style-complex="normal"/>
    </style:style>
    <style:style style:name="T42" style:family="text">
      <style:text-properties fo:font-weight="normal" officeooo:rsid="002ebd85" style:font-weight-asian="normal" style:font-weight-complex="normal"/>
    </style:style>
    <style:style style:name="T43" style:family="text">
      <style:text-properties fo:font-weight="normal" style:font-weight-asian="normal" style:font-weight-complex="normal"/>
    </style:style>
    <style:style style:name="T44" style:family="text">
      <style:text-properties officeooo:rsid="002ebd85"/>
    </style:style>
    <style:style style:name="T45" style:family="text">
      <style:text-properties fo:font-weight="bold" officeooo:rsid="003098fe"/>
    </style:style>
    <style:style style:name="T46" style:family="text">
      <style:text-properties fo:font-weight="bold"/>
    </style:style>
    <style:style style:name="T47" style:family="text">
      <style:text-properties style:use-window-font-color="true" loext:opacity="0%" style:font-name="Arial1" fo:font-size="11pt" fo:font-weight="normal" officeooo:rsid="003098fe" style:font-size-asian="11pt" style:font-weight-asian="normal" style:font-size-complex="11pt" style:font-weight-complex="normal"/>
    </style:style>
    <style:style style:name="T48" style:family="text">
      <style:text-properties fo:font-weight="normal" officeooo:rsid="003098fe" style:font-weight-asian="normal" style:font-weight-complex="normal"/>
    </style:style>
    <style:style style:name="T49" style:family="text">
      <style:text-properties fo:font-style="italic" officeooo:rsid="003098fe"/>
    </style:style>
    <style:style style:name="T50" style:family="text">
      <style:text-properties fo:font-style="italic"/>
    </style:style>
    <style:style style:name="T51" style:family="text">
      <style:text-properties style:use-window-font-color="true" loext:opacity="0%" style:font-name="Arial1" fo:font-size="11pt" fo:font-style="italic" officeooo:rsid="003098fe" style:font-size-asian="11pt" style:font-size-complex="11pt"/>
    </style:style>
    <style:style style:name="T52" style:family="text">
      <style:text-properties style:use-window-font-color="true" loext:opacity="0%" style:font-name="Arial1" fo:font-size="11pt" fo:font-style="italic" style:font-size-asian="11pt" style:font-size-complex="11pt"/>
    </style:style>
    <style:style style:name="T53" style:family="text">
      <style:text-properties fo:font-weight="bold" style:font-weight-asian="bold"/>
    </style:style>
    <style:style style:name="T54" style:family="text">
      <style:text-properties fo:font-weight="bold" officeooo:rsid="003098fe" style:font-weight-asian="bold"/>
    </style:style>
    <style:style style:name="T55" style:family="text">
      <style:text-properties officeooo:rsid="003103ca"/>
    </style:style>
    <style:style style:name="T56" style:family="text">
      <style:text-properties style:use-window-font-color="true" loext:opacity="0%" fo:font-weight="normal" officeooo:rsid="003103ca" style:font-weight-asian="normal" style:font-weight-complex="normal"/>
    </style:style>
    <style:style style:name="T57" style:family="text">
      <style:text-properties style:use-window-font-color="true" loext:opacity="0%" fo:font-weight="normal" style:font-weight-asian="normal" style:font-weight-complex="normal"/>
    </style:style>
    <style:style style:name="T58" style:family="text">
      <style:text-properties style:use-window-font-color="true" loext:opacity="0%" fo:font-style="italic" fo:font-weight="normal" officeooo:rsid="003103ca" style:font-weight-asian="normal" style:font-weight-complex="normal"/>
    </style:style>
    <style:style style:name="T59" style:family="text">
      <style:text-properties style:use-window-font-color="true" loext:opacity="0%" fo:font-style="italic"/>
    </style:style>
    <style:style style:name="T60" style:family="text">
      <style:text-properties style:use-window-font-color="true" loext:opacity="0%"/>
    </style:style>
    <style:style style:name="T61" style:family="text">
      <style:text-properties style:use-window-font-color="true" loext:opacity="0%" style:font-name="Arial1" fo:font-size="11pt" fo:font-style="italic" officeooo:rsid="003103ca" style:font-size-asian="11pt" style:font-size-complex="11pt"/>
    </style:style>
    <style:style style:name="T62" style:family="text">
      <style:text-properties fo:font-weight="normal" officeooo:rsid="0032029f" style:font-weight-asian="normal" style:font-weight-complex="normal"/>
    </style:style>
    <style:style style:name="T63" style:family="text">
      <style:text-properties fo:font-style="italic" fo:font-weight="normal" officeooo:rsid="0032029f" style:font-weight-asian="normal" style:font-weight-complex="normal"/>
    </style:style>
    <style:style style:name="T64" style:family="text">
      <style:text-properties fo:font-style="italic" officeooo:rsid="0032029f"/>
    </style:style>
    <style:style style:name="T65" style:family="text">
      <style:text-properties fo:font-weight="normal" officeooo:rsid="00332758" style:font-weight-asian="normal" style:font-weight-complex="normal"/>
    </style:style>
    <style:style style:name="T66" style:family="text">
      <style:text-properties style:font-name="Arial1" fo:font-weight="normal" officeooo:rsid="00332758" style:font-weight-asian="normal" style:font-weight-complex="normal"/>
    </style:style>
    <style:style style:name="T67" style:family="text">
      <style:text-properties officeooo:rsid="0033109c"/>
    </style:style>
    <style:style style:name="T68" style:family="text">
      <style:text-properties style:font-name="Arial1" fo:font-size="11pt" fo:font-weight="normal" officeooo:rsid="0033109c" style:font-size-asian="11pt" style:font-weight-asian="normal" style:font-size-complex="11pt" style:font-weight-complex="normal"/>
    </style:style>
    <style:style style:name="T69" style:family="text">
      <style:text-properties style:font-name="Arial1" fo:font-size="11pt" fo:font-style="italic" fo:font-weight="normal" officeooo:rsid="0033109c" style:font-size-asian="11pt" style:font-weight-asian="normal" style:font-size-complex="11pt" style:font-weight-complex="normal"/>
    </style:style>
    <style:style style:name="T70" style:family="text">
      <style:text-properties style:font-name="Arial1" fo:font-size="11pt" fo:font-style="italic" style:font-size-asian="11pt" style:font-size-complex="11pt"/>
    </style:style>
    <style:style style:name="T71" style:family="text">
      <style:text-properties style:font-name="Arial1" fo:font-size="11pt" fo:font-style="italic" officeooo:rsid="0033109c" style:font-size-asian="11pt" style:font-size-complex="11pt"/>
    </style:style>
    <style:style style:name="T72" style:family="text">
      <style:text-properties officeooo:rsid="0034aa6d" style:font-weight-asian="bold"/>
    </style:style>
    <style:style style:name="T73" style:family="text">
      <style:text-properties style:font-weight-asian="bold"/>
    </style:style>
    <style:style style:name="T74" style:family="text">
      <style:text-properties fo:font-weight="normal" officeooo:rsid="0034aa6d" style:font-weight-asian="normal" style:font-weight-complex="normal"/>
    </style:style>
    <style:style style:name="T75" style:family="text">
      <style:text-properties fo:font-style="italic" fo:font-weight="normal" officeooo:rsid="0034aa6d" style:font-weight-asian="normal" style:font-weight-complex="normal"/>
    </style:style>
    <style:style style:name="T76" style:family="text">
      <style:text-properties fo:font-style="italic" officeooo:rsid="0034aa6d"/>
    </style:style>
    <style:style style:name="T77" style:family="text">
      <style:text-properties style:font-name="Arial1" fo:font-size="11pt" fo:font-weight="normal" officeooo:rsid="0034aa6d" style:font-size-asian="11pt" style:font-weight-asian="normal" style:font-size-complex="11pt" style:font-weight-complex="normal"/>
    </style:style>
    <style:style style:name="T78" style:family="text">
      <style:text-properties style:use-window-font-color="true" loext:opacity="0%" officeooo:rsid="00354f2d"/>
    </style:style>
    <style:style style:name="T79" style:family="text">
      <style:text-properties fo:font-weight="normal" officeooo:rsid="00354f2d" style:font-weight-asian="normal" style:font-weight-complex="normal"/>
    </style:style>
    <style:style style:name="T80" style:family="text">
      <style:text-properties fo:font-style="italic" fo:font-weight="normal" officeooo:rsid="00354f2d" style:font-weight-asian="normal" style:font-weight-complex="normal"/>
    </style:style>
    <style:style style:name="T81" style:family="text">
      <style:text-properties fo:font-style="italic" officeooo:rsid="00354f2d"/>
    </style:style>
    <style:style style:name="T82" style:family="text">
      <style:text-properties style:font-name="Arial1" fo:font-size="11pt" fo:font-weight="normal" officeooo:rsid="00354f2d" style:font-size-asian="11pt" style:font-weight-asian="normal" style:font-size-complex="11pt" style:font-weight-complex="normal"/>
    </style:style>
    <style:style style:name="T83" style:family="text">
      <style:text-properties style:use-window-font-color="true" loext:opacity="0%" officeooo:rsid="00361a5d"/>
    </style:style>
    <style:style style:name="T84" style:family="text">
      <style:text-properties style:font-name="Arial1" fo:font-size="11pt" fo:font-weight="normal" officeooo:rsid="00361a5d" style:font-size-asian="11pt" style:font-weight-asian="normal" style:font-size-complex="11pt" style:font-weight-complex="normal"/>
    </style:style>
    <style:style style:name="T85" style:family="text">
      <style:text-properties style:font-name="Arial1" fo:font-size="11pt" fo:font-style="italic" fo:font-weight="normal" officeooo:rsid="00361a5d" style:font-size-asian="11pt" style:font-weight-asian="normal" style:font-size-complex="11pt" style:font-weight-complex="normal"/>
    </style:style>
    <style:style style:name="T86" style:family="text">
      <style:text-properties style:font-name="Arial1" fo:font-size="11pt" fo:font-style="italic" officeooo:rsid="00361a5d" style:font-size-asian="11pt" style:font-size-complex="11pt"/>
    </style:style>
    <style:style style:name="T87" style:family="text">
      <style:text-properties style:use-window-font-color="true" loext:opacity="0%" fo:font-weight="normal" officeooo:rsid="00361a5d" style:font-weight-asian="normal" style:font-weight-complex="normal"/>
    </style:style>
    <style:style style:name="T88" style:family="text">
      <style:text-properties style:use-window-font-color="true" loext:opacity="0%" fo:font-weight="normal" officeooo:rsid="0033109c" style:font-weight-asian="normal" style:font-weight-complex="normal"/>
    </style:style>
    <style:style style:name="T89" style:family="text">
      <style:text-properties style:use-window-font-color="true" loext:opacity="0%" style:font-name="Arial1" fo:font-weight="normal" style:font-weight-asian="normal" style:font-weight-complex="normal"/>
    </style:style>
    <style:style style:name="T90" style:family="text">
      <style:text-properties style:use-window-font-color="true" loext:opacity="0%" style:font-name="Arial2" fo:font-size="11pt" fo:font-weight="bold" style:font-size-asian="11pt" style:font-weight-asian="bold"/>
    </style:style>
    <style:style style:name="T91" style:family="text">
      <style:text-properties style:use-window-font-color="true" loext:opacity="0%" style:font-name="Arial2" fo:font-size="11pt" style:font-size-asian="11pt"/>
    </style:style>
    <style:style style:name="T92" style:family="text">
      <style:text-properties style:use-window-font-color="true" loext:opacity="0%" style:font-name="Arial2" fo:font-size="11pt" fo:font-style="normal" style:font-size-asian="11pt" style:font-style-asian="normal" style:font-style-complex="normal"/>
    </style:style>
    <style:style style:name="T93" style:family="text">
      <style:text-properties fo:font-size="11pt" officeooo:rsid="002577e0" style:font-size-asian="11pt"/>
    </style:style>
    <style:style style:name="T94" style:family="text">
      <style:text-properties fo:font-size="11pt" fo:font-weight="normal" style:font-size-asian="11pt" style:font-weight-asian="normal" style:font-weight-complex="normal"/>
    </style:style>
    <style:style style:name="T95" style:family="text">
      <style:text-properties fo:font-size="9pt" style:font-size-asian="9pt"/>
    </style:style>
    <style:style style:name="T96" style:family="text">
      <style:text-properties fo:font-size="12pt" fo:font-weight="bold" officeooo:rsid="0033109c" style:font-size-asian="12pt" style:font-weight-asian="bold"/>
    </style:style>
    <style:style style:name="T97" style:family="text">
      <style:text-properties fo:color="#ffffff" loext:opacity="100%" style:font-name="Liberation-Sans-Bold" fo:font-size="9.5pt" fo:font-weight="bold" style:font-size-asian="9.5pt" style:font-weight-asian="bold"/>
    </style:style>
    <style:style style:name="T98" style:family="text">
      <style:text-properties fo:font-size="9pt" fo:font-style="italic" fo:font-weight="bold" style:font-size-asian="9pt" style:font-style-asian="italic" style:font-weight-asian="bold"/>
    </style:style>
    <style:style style:name="T99" style:family="text">
      <style:text-properties fo:color="#333333" loext:opacity="100%" style:font-name="Liberation-Sans" fo:font-size="10.5pt" style:font-size-asian="10.5pt"/>
    </style:style>
    <style:style style:name="T100" style:family="text">
      <style:text-properties fo:font-size="10.5pt" fo:font-weight="bold" style:font-size-asian="10.5pt" style:font-weight-asian="bold"/>
    </style:style>
    <style:style style:name="T101" style:family="text">
      <style:text-properties style:font-name="Arial1" fo:font-size="11pt" fo:font-style="normal" style:font-size-asian="11pt" style:font-style-asian="normal" style:font-size-complex="11pt" style:font-style-complex="normal"/>
    </style:style>
    <style:style style:name="T102" style:family="text">
      <style:text-properties style:font-name="Arial1" fo:font-size="11pt" officeooo:rsid="00380536" style:font-size-asian="11pt" style:font-size-complex="11pt"/>
    </style:style>
    <style:style style:name="T103" style:family="text">
      <style:text-properties style:font-name="Arial1" fo:font-size="11pt" fo:font-style="normal" officeooo:rsid="00380536" style:font-size-asian="11pt" style:font-style-asian="normal" style:font-size-complex="11pt" style:font-style-complex="normal"/>
    </style:style>
    <style:style style:name="T104" style:family="text">
      <style:text-properties style:font-name="Arial1" fo:font-size="11pt" officeooo:rsid="00383f16" style:font-size-asian="11pt" style:font-size-complex="11pt"/>
    </style:style>
    <style:style style:name="T105" style:family="text">
      <style:text-properties officeooo:rsid="003a27af"/>
    </style:style>
    <style:style style:name="T106" style:family="text">
      <style:text-properties style:font-name="Arial1" fo:font-size="11pt" fo:font-weight="bold" officeooo:rsid="003a27af" style:font-size-asian="11pt" style:font-weight-asian="normal" style:font-size-complex="11pt" style:font-weight-complex="normal"/>
    </style:style>
    <style:style style:name="T107" style:family="text">
      <style:text-properties style:use-window-font-color="true" loext:opacity="0%" style:font-name="Arial1" fo:font-size="11pt" officeooo:rsid="0046d5f5" style:font-size-asian="11pt" style:font-size-complex="11pt"/>
    </style:style>
    <style:style style:name="T108" style:family="text">
      <style:text-properties style:use-window-font-color="true" loext:opacity="0%" style:font-name="Arial1" fo:font-size="11pt" fo:font-weight="normal" officeooo:rsid="0046d5f5" style:font-size-asian="11pt" style:font-weight-asian="normal" style:font-size-complex="11pt" style:font-weight-complex="normal"/>
    </style:style>
    <style:style style:name="T109" style:family="text">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T110" style:family="text">
      <style:text-properties style:font-name="Arial1"/>
    </style:style>
    <style:style style:name="T111" style:family="text">
      <style:text-properties fo:color="#555555" loext:opacity="100%" style:font-name="Liberation-Sans" fo:font-size="9pt" style:font-size-asian="9pt"/>
    </style:style>
    <style:style style:name="T112" style:family="text">
      <style:text-properties officeooo:rsid="00412b61"/>
    </style:style>
    <style:style style:name="T113" style:family="text">
      <style:text-properties style:font-name="Arial1" fo:font-size="11pt" officeooo:rsid="00412b61" style:font-size-asian="11pt" style:font-size-complex="11pt"/>
    </style:style>
    <style:style style:name="T114" style:family="text">
      <style:text-properties style:font-name="Arial1" fo:font-size="11pt" fo:font-weight="bold" style:font-size-asian="11pt" style:font-size-complex="11pt"/>
    </style:style>
    <style:style style:name="T115" style:family="text">
      <style:text-properties officeooo:rsid="0047db78"/>
    </style:style>
    <style:style style:name="T116" style:family="text">
      <style:text-properties fo:font-style="normal" fo:font-weight="normal" style:font-style-asian="normal" style:font-weight-asian="normal" style:font-style-complex="normal" style:font-weight-complex="normal"/>
    </style:style>
    <style:style style:name="T117" style:family="text">
      <style:text-properties fo:font-style="normal" fo:font-weight="normal" officeooo:rsid="0047db78" style:font-style-asian="normal" style:font-weight-asian="normal" style:font-style-complex="normal" style:font-weight-complex="normal"/>
    </style:style>
    <style:style style:name="T118" style:family="text">
      <style:text-properties officeooo:rsid="004171b7"/>
    </style:style>
    <style:style style:name="T119" style:family="text">
      <style:text-properties style:font-name="Arial1" fo:font-size="11pt" officeooo:rsid="004171b7" style:font-size-asian="11pt" style:font-size-complex="11pt"/>
    </style:style>
    <style:style style:name="T120" style:family="text">
      <style:text-properties style:font-name="Arial1" fo:font-size="11pt" fo:font-weight="normal" officeooo:rsid="004171b7" style:font-size-asian="11pt" style:font-weight-asian="normal" style:font-size-complex="11pt" style:font-weight-complex="normal"/>
    </style:style>
    <style:style style:name="T121" style:family="text">
      <style:text-properties style:font-name="Arial1" fo:font-size="11pt" fo:font-weight="normal" officeooo:rsid="00426560" style:font-size-asian="11pt" style:font-weight-asian="normal" style:font-size-complex="11pt" style:font-weight-complex="normal"/>
    </style:style>
    <style:style style:name="T122" style:family="text">
      <style:text-properties style:font-name="Arial1" fo:font-size="11pt" officeooo:rsid="00426560" style:font-size-asian="11pt" style:font-size-complex="11pt"/>
    </style:style>
    <style:style style:name="T123" style:family="text">
      <style:text-properties style:font-name="Arial1" fo:font-size="11pt" fo:font-style="normal" officeooo:rsid="00426560" style:font-size-asian="11pt" style:font-style-asian="normal" style:font-size-complex="11pt" style:font-style-complex="normal"/>
    </style:style>
    <style:style style:name="T124" style:family="text">
      <style:text-properties style:font-name="Arial1" fo:font-size="11pt" fo:font-style="normal" officeooo:rsid="004171b7" style:font-size-asian="11pt" style:font-style-asian="normal" style:font-size-complex="11pt" style:font-style-complex="normal"/>
    </style:style>
    <style:style style:name="T125" style:family="text">
      <style:text-properties fo:font-weight="normal" officeooo:rsid="004171b7" style:font-weight-asian="normal" style:font-weight-complex="normal"/>
    </style:style>
    <style:style style:name="T126" style:family="text">
      <style:text-properties style:font-name="Arial1" fo:font-size="11pt" officeooo:rsid="00481faa" style:font-size-asian="11pt" style:font-size-complex="11pt"/>
    </style:style>
    <style:style style:name="T127" style:family="text">
      <style:text-properties fo:font-weight="bold" officeooo:rsid="0043593d" style:font-weight-asian="bold"/>
    </style:style>
    <style:style style:name="T128" style:family="text">
      <style:text-properties style:font-name="Arial1" fo:font-size="11pt" fo:font-style="normal" fo:font-weight="normal" officeooo:rsid="00481faa" style:font-size-asian="11pt" style:font-style-asian="normal" style:font-weight-asian="normal" style:font-size-complex="11pt" style:font-style-complex="normal" style:font-weight-complex="normal"/>
    </style:style>
    <style:style style:name="T129" style:family="text">
      <style:text-properties style:font-name="Arial1" fo:font-size="11pt" officeooo:rsid="0049ed8f" style:font-size-asian="11pt" style:font-size-complex="11pt"/>
    </style:style>
    <style:style style:name="T130" style:family="text">
      <style:text-properties officeooo:rsid="0043593d"/>
    </style:style>
    <style:style style:name="T131" style:family="text">
      <style:text-properties style:font-name="Arial1" fo:font-size="11pt" fo:font-style="normal" officeooo:rsid="004b1423" style:font-size-asian="11pt" style:font-style-asian="normal" style:font-size-complex="11pt" style:font-style-complex="normal"/>
    </style:style>
    <style:style style:name="T132" style:family="text">
      <style:text-properties style:font-name="Arial1" fo:font-size="11pt" officeooo:rsid="004b1423" style:font-size-asian="11pt" style:font-size-complex="11pt"/>
    </style:style>
    <style:style style:name="T133" style:family="text">
      <style:text-properties style:font-name="Arial1" fo:font-size="11pt" fo:font-weight="normal" officeooo:rsid="004b1423" style:font-size-asian="11pt" style:font-weight-asian="normal" style:font-size-complex="11pt" style:font-weight-complex="normal"/>
    </style:style>
    <style:style style:name="T134" style:family="text">
      <style:text-properties officeooo:rsid="0044b8ab"/>
    </style:style>
    <style:style style:name="T135" style:family="text">
      <style:text-properties style:font-name="Arial1" fo:font-size="11pt" fo:font-style="normal" fo:font-weight="normal" officeooo:rsid="004ca87d" style:font-size-asian="11pt" style:font-style-asian="normal" style:font-weight-asian="normal" style:font-size-complex="11pt" style:font-style-complex="normal" style:font-weight-complex="normal"/>
    </style:style>
    <style:style style:name="T136" style:family="text">
      <style:text-properties style:font-name="Arial1" fo:font-size="11pt" fo:font-weight="normal" officeooo:rsid="004ca87d" style:font-size-asian="11pt" style:font-weight-asian="normal" style:font-size-complex="11pt" style:font-weight-complex="normal"/>
    </style:style>
    <style:style style:name="T137" style:family="text">
      <style:text-properties style:font-name="Arial1" fo:font-size="11pt" officeooo:rsid="00468dcc" style:font-size-asian="11pt" style:font-size-complex="11pt"/>
    </style:style>
    <style:style style:name="T138" style:family="text">
      <style:text-properties style:font-name="Arial1" fo:font-size="11pt" fo:font-style="normal" officeooo:rsid="004d0f36" style:font-size-asian="11pt" style:font-style-asian="normal" style:font-size-complex="11pt" style:font-style-complex="normal"/>
    </style:style>
    <style:style style:name="T139" style:family="text">
      <style:text-properties style:font-name="Arial1" fo:font-size="11pt" officeooo:rsid="004d0f36" style:font-size-asian="11pt" style:font-size-complex="11pt"/>
    </style:style>
    <style:style style:name="T140" style:family="text">
      <style:text-properties style:font-name="Arial1" fo:font-size="11pt" fo:font-style="italic" fo:font-weight="normal" style:font-size-asian="11pt" style:font-weight-asian="normal" style:font-size-complex="11pt" style:font-weight-complex="normal"/>
    </style:style>
    <style:style style:name="T141" style:family="text">
      <style:text-properties style:font-name="Arial1" fo:font-size="11pt" fo:font-weight="normal" officeooo:rsid="004d0f36" style:font-size-asian="11pt" style:font-weight-asian="normal" style:font-size-complex="11pt" style:font-weight-complex="normal"/>
    </style:style>
    <style:style style:name="T142" style:family="text">
      <style:text-properties fo:font-weight="normal" officeooo:rsid="004dd342" style:font-weight-asian="normal" style:font-weight-complex="normal"/>
    </style:style>
    <style:style style:name="T143" style:family="text">
      <style:text-properties officeooo:rsid="004dd342"/>
    </style:style>
    <style:style style:name="T144" style:family="text">
      <style:text-properties style:font-name="Arial1" fo:font-size="11pt" officeooo:rsid="004dd342" style:font-size-asian="11pt" style:font-size-complex="11pt"/>
    </style:style>
    <style:style style:name="T145" style:family="text">
      <style:text-properties style:font-name="Arial1" fo:font-size="11pt" fo:font-style="normal" fo:font-weight="normal" officeooo:rsid="004dd342" style:font-size-asian="11pt" style:font-style-asian="normal" style:font-weight-asian="normal" style:font-size-complex="11pt" style:font-style-complex="normal" style:font-weight-complex="normal"/>
    </style:style>
    <style:style style:name="T146" style:family="text">
      <style:text-properties style:font-name="Arial1" fo:font-size="11pt" fo:font-weight="normal" officeooo:rsid="004dd342" style:font-size-asian="11pt" style:font-weight-asian="normal" style:font-size-complex="11pt" style:font-weight-complex="normal"/>
    </style:style>
    <style:style style:name="T147" style:family="text">
      <style:text-properties fo:color="#2b6cb1" loext:opacity="100%" style:font-name="Liberation-Sans-Bold" fo:font-size="11pt" fo:font-weight="bold" style:font-size-asian="11pt" style:font-weight-asian="bold"/>
    </style:style>
    <style:style style:name="T148" style:family="text">
      <style:text-properties fo:font-size="11pt" officeooo:rsid="002c42ef" style:font-size-asian="11pt"/>
    </style:style>
    <style:style style:name="T149" style:family="text">
      <style:text-properties fo:font-size="11pt" fo:font-style="italic" style:font-size-asian="11pt" style:font-style-asian="italic"/>
    </style:style>
    <style:style style:name="T150" style:family="text">
      <style:text-properties fo:font-size="12pt" style:font-size-asian="12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loext:marker-style-name="T1"><text:s/><text:span text:style-name="T2">MAC0426-MAC5760 </text:span></text:p>
      <text:p text:style-name="P2" loext:marker-style-name="T1"><text:span text:style-name="T3">IME/USP – 202</text:span><text:span text:style-name="T4">6</text:span></text:p>
      <text:p text:style-name="P2" loext:marker-style-name="T1"><text:span text:style-name="T4"/></text:p>
      <text:p text:style-name="P2" loext:marker-style-name="T1"><text:span text:style-name="T4"/></text:p>
      <text:p text:style-name="P2" loext:marker-style-name="T1"><text:span text:style-name="T4"/></text:p>
      <text:p text:style-name="P2" loext:marker-style-name="T1"><text:span text:style-name="T4"/></text:p>
      <text:p text:style-name="P2" loext:marker-style-name="T1"><text:span text:style-name="T4"/></text:p>
      <text:p text:style-name="P2" loext:marker-style-name="T1"><text:span text:style-name="T4"/></text:p>
      <text:p text:style-name="P2" loext:marker-style-name="T1"><text:span text:style-name="T4"/></text:p>
      <text:p text:style-name="P2" loext:marker-style-name="T1"><text:span text:style-name="T4"/></text:p>
      <text:p text:style-name="P2" loext:marker-style-name="T1"><text:span text:style-name="T4"/></text:p>
      <text:p text:style-name="P2" loext:marker-style-name="T1"><text:span text:style-name="T4"/></text:p>
      <text:p text:style-name="P2" loext:marker-style-name="T1"><text:span text:style-name="T4"/></text:p>
      <text:p text:style-name="P2" loext:marker-style-name="T5"><text:span text:style-name="T6">Análise de Desempenho de </text:span></text:p>
      <text:p text:style-name="P2" loext:marker-style-name="T5"><text:span text:style-name="T6">Bancos de Dados </text:span></text:p>
      <text:p text:style-name="P2" loext:marker-style-name="T5"><text:span text:style-name="T5"/></text:p>
      <text:p text:style-name="P2" loext:marker-style-name="T5"><text:span text:style-name="T5"/></text:p>
      <text:p text:style-name="P2" loext:marker-style-name="T5"><text:span text:style-name="T5"/></text:p>
      <text:p text:style-name="P2" loext:marker-style-name="T5"><text:span text:style-name="T5"/></text:p>
      <text:p text:style-name="P2" loext:marker-style-name="T5"><text:span text:style-name="T5"/></text:p>
      <text:p text:style-name="P2" loext:marker-style-name="T5"><text:span text:style-name="T5"/></text:p>
      <text:p text:style-name="P2" loext:marker-style-name="T5"><text:span text:style-name="T5"/></text:p>
      <text:p text:style-name="P2" loext:marker-style-name="T5"><text:span text:style-name="T5"/></text:p>
      <text:p text:style-name="P2" loext:marker-style-name="T1"><text:span text:style-name="T3">Grupo: </text:span></text:p>
      <text:p text:style-name="P2" loext:marker-style-name="T7"><text:span text:style-name="T8">Enzo Furegatti Spinella</text:span><text:span text:style-name="T9"> </text:span><text:span text:style-name="T8">14568198</text:span><text:span text:style-name="T9"> </text:span></text:p>
      <text:p text:style-name="P2" loext:marker-style-name="T7"><text:span text:style-name="T8">Ísis Ardisson Logullo</text:span><text:span text:style-name="T9"> </text:span><text:span text:style-name="T8">7577410</text:span><text:span text:style-name="T9"> </text:span></text:p>
      <text:p text:style-name="P3"><text:span text:style-name="T8">Luiz Fernando de Freitas Fernandes</text:span><text:span text:style-name="T9"> </text:span><text:span text:style-name="T8">13671678</text:span></text:p>
      <text:p text:style-name="P4">Matheus Rodrigues da Silva Espalaor 14598615</text:p>
      <text:p text:style-name="P3"><text:soft-page-break/><text:span text:style-name="T8">­</text:span><text:span text:style-name="T9"> </text:span></text:p>
      <text:p text:style-name="P5" loext:marker-style-name="T10"><text:span text:style-name="T11">1. Introdução </text:span></text:p>
      <text:p text:style-name="P6"><text:span text:style-name="T9"/></text:p>
      <text:p text:style-name="P7"><text:span text:style-name="T12"><text:tab/></text:span><text:span text:style-name="T13">Este trabalho consiste </text:span><text:span text:style-name="T14">num estudo para medir e comparar o desempenho dos SGBDs PostgreSQL </text:span><text:span text:style-name="T15">e MySQL na execu</text:span><text:span text:style-name="T16">çã</text:span><text:span text:style-name="T15">o de diversos tipos de consultas e opera</text:span><text:span text:style-name="T16">çõ</text:span><text:span text:style-name="T15">es de modifica</text:span><text:span text:style-name="T16">çã</text:span><text:span text:style-name="T15">o dos dados em SQL sobre um banco de dados relacional, com e sem o apoio de </text:span><text:span text:style-name="T16">í</text:span><text:span text:style-name="T15">ndices. O cerne do experimento </text:span><text:span text:style-name="T17">está</text:span><text:span text:style-name="T15"> em </text:span><text:span text:style-name="T17">a</text:span><text:span text:style-name="T15">nalisar como cada motor se comporta sob diferentes cargas de trabalho em SQL, </text:span><text:span text:style-name="T17">abrangendo</text:span><text:span text:style-name="T15"> tanto consultas complexas de leitura quanto operações </text:span><text:span text:style-name="T17">DML</text:span><text:span text:style-name="T15">, considerando cenários com e sem o apoio de estruturas de indexação (Árvores B+ e tabelas Hash).</text:span></text:p>
      <text:p text:style-name="P8"/>
      <text:p text:style-name="P9" loext:marker-style-name="T18"><text:tab/>Fo<text:span text:style-name="T19">i usado um</text:span> banco de dados do <text:span text:style-name="T20">Stack Overflow</text:span><text:span text:style-name="T21"> </text:span>referente ao ano de 2010. Este dataset <text:span text:style-name="T19">possui</text:span> tabelas massivas contendo milhões de registros interconectados (como usuários, postagens, comentários e votos). A avaliação <text:span text:style-name="T19">reside</text:span> principalmente na métrica de tempo total de execução das operações, registrando e isolando os efeitos colaterais de cache, e mapeando de maneira secundária a utilização de memória RAM durante o processamento.</text:p>
      <text:p text:style-name="P10" loext:marker-style-name="T18"><text:span text:style-name="T22"/></text:p>
      <text:p text:style-name="P10" loext:marker-style-name="T23"><text:span text:style-name="T11">2. Descrição dos Experimentos Realizados</text:span></text:p>
      <text:p text:style-name="P10" loext:marker-style-name="T23"><text:span text:style-name="T11"/></text:p>
      <text:p text:style-name="P10" loext:marker-style-name="T18"><text:span text:style-name="T22"><text:tab/>Esta seção apresenta os detalhes técnicos dos experimentos concebidos e implementados no estudo, detalhando as operações selecionadas, a modelagem dos cenários sob teste e a infraestrutura computacional utilizada.</text:span></text:p>
      <text:p text:style-name="P10" loext:marker-style-name="T18"><text:span text:style-name="T22"/></text:p>
      <text:p text:style-name="P10" loext:marker-style-name="T24"><text:span text:style-name="T25">2.1. Operações Avaliadas sobre o BD</text:span></text:p>
      <text:p text:style-name="P10" loext:marker-style-name="T24"><text:span text:style-name="T25"/></text:p>
      <text:p text:style-name="P10" loext:marker-style-name="T18"><text:span text:style-name="T22"><text:tab/>Definiu-se para o experimento um conjunto padronizado de operações em SQL que abrange uma ampla gama de modificações e consultas de dados. As categorias de operações executadas são descritas a seguir:</text:span></text:p>
      <text:p text:style-name="P10" loext:marker-style-name="T18"><text:span text:style-name="T22"/></text:p>
      <text:p text:style-name="P11" loext:marker-style-name="T18"><text:span text:style-name="T26">Operações de Modificação de Dados: </text:span></text:p>
      <text:p text:style-name="P11" loext:marker-style-name="T18"><text:span text:style-name="T22"/></text:p>
      <text:p text:style-name="P11" loext:marker-style-name="T18"><text:span text:style-name="T22"><text:tab/>Compreendem a inserção sequencial de novos registros (INSERT), a alteração em massa de registros existentes aplicando predicados específicos (UPDATE), e a remoção controlada de tuplas em tabelas principais (DELETE).</text:span></text:p>
      <text:p text:style-name="P11" loext:marker-style-name="T18"><text:span text:style-name="T22"/></text:p>
      <text:h text:style-name="P12" text:outline-level="4" loext:marker-style-name="T18"><text:span text:style-name="T27">1) </text:span><text:span text:style-name="T22">Cenário de Inserção (INSERT</text:span></text:h>
      <text:p text:style-name="P13" loext:marker-style-name="T18"><text:span text:style-name="T28"><text:tab/>As operações de inserção foram projetadas a partir de uma estratégia de carga controlada sobre tabelas espelho clonadas (denominadas com o sufixo </text:span><text:span text:style-name="Source_20_Text"><text:span text:style-name="T28">_for_insert</text:span></text:span><text:span text:style-name="T28">). O cenário foi estruturado com base nos seguintes critérios de construção: </text:span></text:p>
      <text:p text:style-name="P14"><text:span text:style-name="T29">1.1) </text:span><text:span text:style-name="T30">Isolamento de Estruturas: Antes da execução, criam-se réplicas vazias das tabelas originais, garantindo que os novos registros não entrem em conflito com chaves primárias existentes.</text:span></text:p>
      <text:p text:style-name="P14"><text:span text:style-name="T29">1.2) </text:span><text:span text:style-name="T30">Ordem de Dependência e Integridade Referencial: Os comandos de inserção foram rigorosamente ordenados respeitando as restrições de chave estrangeira (</text:span><text:span text:style-name="T31">foreign key</text:span><text:span text:style-name="T30">).</text:span><text:span text:style-name="T32"> A sequência inicia-se nas entidades independentes (como </text:span><text:span text:style-name="Source_20_Text"><text:span text:style-name="T32">users_for_insert</text:span></text:span><text:span text:style-name="T32"> e </text:span><text:span text:style-name="Source_20_Text"><text:span text:style-name="T32">post_types_for_insert</text:span></text:span><text:span text:style-name="T32">) e propaga-se de forma encadeada até as tabelas de relacionamento ou tabelas dependentes (como </text:span><text:span text:style-name="Source_20_Text"><text:span text:style-name="T32">posts_for_insert</text:span></text:span><text:span text:style-name="T32">, </text:span><text:span text:style-name="Source_20_Text"><text:span text:style-name="T32">comments_for_insert</text:span></text:span><text:span text:style-name="T32"> e </text:span><text:span text:style-name="Source_20_Text"><text:span text:style-name="T32">votes_for_insert</text:span></text:span><text:span text:style-name="T32">), garantindo que nenhuma restrição de integridade impeça a execução das queries.</text:span></text:p>
      <text:p text:style-name="P15"><text:span text:style-name="T29">1.3) </text:span><text:span text:style-name="T30">Volume e Diversidade de Dados: Cada tupla foi populada com uma variedade representativa de tipos de dados (inteiros, strings longas para o corpo das postagens, marcações de tempo via </text:span><text:span text:style-name="Source_20_Text"><text:span text:style-name="T33">CURRENT_TIMESTAMP</text:span></text:span><text:span text:style-name="T30"> e strings formatadas para tags), permitindo avaliar como cada motor gerencia a alocação de páginas de memória para diferentes estruturas.</text:span></text:p>
      <text:p text:style-name="P16"><text:soft-page-break/></text:p>
      <text:h text:style-name="P17" text:outline-level="4"><text:span text:style-name="T34">2) </text:span>Cenário de Remoção (DELETE)</text:h>
      <text:p text:style-name="P14"><text:span text:style-name="T35"><text:tab/>A</text:span><text:span text:style-name="T32">s operações de exclusão </text:span><text:span text:style-name="T35">foram</text:span><text:span text:style-name="T32"> projetada</text:span><text:span text:style-name="T35">s</text:span><text:span text:style-name="T32"> a partir de uma estratégia de expurgo controlado sobre tabelas espelho clonadas (denominadas com o sufixo </text:span><text:span text:style-name="Source_20_Text"><text:span text:style-name="T32">_for_delete</text:span></text:span><text:span text:style-name="T32">). O cenário foi estruturado com base nos seguintes critérios de construção:</text:span></text:p>
      <text:p text:style-name="P18"><text:span text:style-name="T29">2.1) </text:span><text:span text:style-name="T30">Isolamento e Carga Inicial de Dados: Antes de iniciar as medições de deleção, as tabelas de testes são limpas e estruturadas à imagem do esquema original</text:span><text:span text:style-name="T32">. Na sequência, elas são populadas por meio de uma carga massiva. </text:span><text:span text:style-name="T36">São</text:span><text:span text:style-name="T32"> ignora</text:span><text:span text:style-name="T36">das</text:span><text:span text:style-name="T32"> possíveis duplicidades de chaves durante a replicação do ambiente de testes </text:span><text:span text:style-name="T36">(</text:span><text:span text:style-name="Source_20_Text"><text:span text:style-name="T32">INSERT IGNORE</text:span></text:span><text:span text:style-name="T32"> </text:span><text:span text:style-name="T36">e</text:span><text:span text:style-name="T32"> </text:span><text:span text:style-name="Source_20_Text"><text:span text:style-name="T32">ON CONFLICT DO NOTHING</text:span></text:span><text:span text:style-name="Source_20_Text"><text:span text:style-name="T37">)</text:span></text:span><text:span text:style-name="T32">.</text:span></text:p>
      <text:p text:style-name="P18"><text:span text:style-name="T38">2.2) </text:span><text:span text:style-name="T30">Inversão Estrita da Ordem de Dependência (Desempilhamento): Para garantir o cumprimento </text:span><text:span text:style-name="T39">rigoroso das restrições de integridade, o fluxo de execução dos comandos </text:span><text:span text:style-name="Source_20_Text"><text:span text:style-name="T39">DELETE</text:span></text:span><text:span text:style-name="T39"> foi programado de forma estritamente inversa à hierarquia das chaves estrangeiras.</text:span><text:span text:style-name="T40"> A limpeza inicia-se obrigatoriamente pelas tabelas dependentes/filhas (como </text:span><text:span text:style-name="Source_20_Text"><text:span text:style-name="T40">votes_for_delete</text:span></text:span><text:span text:style-name="T40">, </text:span><text:span text:style-name="Source_20_Text"><text:span text:style-name="T40">postlinks_for_delete</text:span></text:span><text:span text:style-name="T40">, </text:span><text:span text:style-name="Source_20_Text"><text:span text:style-name="T40">comments_for_delete</text:span></text:span><text:span text:style-name="T40"> e </text:span><text:span text:style-name="Source_20_Text"><text:span text:style-name="T40">badges_for_delete</text:span></text:span><text:span text:style-name="T40">), avança para a entidade intermediária (</text:span><text:span text:style-name="Source_20_Text"><text:span text:style-name="T40">posts_for_delete</text:span></text:span><text:span text:style-name="T40">) e retrocede até alcançar as tabelas pai (como </text:span><text:span text:style-name="Source_20_Text"><text:span text:style-name="T40">users_for_delete</text:span></text:span><text:span text:style-name="T40"> e tabelas de tipos). Essa abordagem evita erros de violação de</text:span><text:span text:style-name="T41"> foreign keys </text:span><text:span text:style-name="T40">e força o SGBD a processar as remoções de baixo para cima na árvore de relacionamentos.</text:span></text:p>
      <text:p text:style-name="P19"><text:span text:style-name="T42">2.3) Exclusão</text:span><text:span text:style-name="T43"> por Chave Primária: As queries de exclusão operam aplicando filtros exatos baseados no identificador único de cada registro.</text:span> O uso de chaves primárias nos predicados isola o impacto do teste à eficiência do índice e ao custo de busca exata <text:span text:style-name="T44">antes do</text:span> expurgo do registro.</text:p>
      <text:h text:style-name="P20" text:outline-level="4"><text:span text:style-name="T45">3) </text:span><text:span text:style-name="T46">Cenário de Alteração (UPDATE)</text:span></text:h>
      <text:p text:style-name="P15"><text:span text:style-name="T40"><text:tab/>As operações de alteração foram projetadas a partir de uma estratégia de modificação controlada sobre tabelas espelho clonadas (denominadas com o sufixo </text:span><text:span text:style-name="Source_20_Text"><text:span text:style-name="T40">_for_update</text:span></text:span><text:span text:style-name="T40">). O cenário foi estruturado com base nos seguintes critérios de construção:</text:span></text:p>
      <text:p text:style-name="P15"><text:span text:style-name="T47">3.1) </text:span><text:span text:style-name="T39">Isolamento e Consistência da Base: Precedendo as medições, as estruturas temporárias são limpas via comando </text:span><text:span text:style-name="Source_20_Text"><text:span text:style-name="T39">TRUNCATE</text:span></text:span><text:span text:style-name="T39"> e totalmente repovoadas com os dados vigentes da produção por meio de cargas em lote (</text:span><text:span text:style-name="Source_20_Text"><text:span text:style-name="T39">INSERT ...</text:span></text:span><text:span text:style-name="Source_20_Text"><text:span text:style-name="T40"> SELECT</text:span></text:span><text:span text:style-name="T40">). Adicionalmente, inserem-se novos registros isolados especificamente destinados a sofrerem modificações posteriores, estabelecendo um ponto de partida idêntico para ambos os SGBDs em cada rodada de testes.</text:span></text:p>
      <text:p text:style-name="P21"><text:span text:style-name="T48">3.2) </text:span><text:span text:style-name="T43">Diversidade e Complexidade de Predicados: As queries de atualização foram categorizadas para simular diferentes fluxos.</text:span> Foram estruturados cenários de:</text:p>
      <text:p text:style-name="P21"><text:span text:style-name="T49"><text:tab/>3.2.1) </text:span><text:span text:style-name="T50">Atualizações Cadastrais Completas:</text:span> Substituição integral de strings e campos de localização (ex: alteração de dados de perfil do usuário).</text:p>
      <text:p text:style-name="P15"><text:span text:style-name="T51"><text:tab/>3.2.2) </text:span><text:span text:style-name="T52">Modificações Incrementais e Cumulativas:</text:span><text:span text:style-name="T40"> Simulação de engajamento através de operações aritméticas concorrentes nos índices (ex: incrementos de </text:span><text:span text:style-name="Source_20_Text"><text:span text:style-name="T40">Score</text:span></text:span><text:span text:style-name="T40">, </text:span><text:span text:style-name="Source_20_Text"><text:span text:style-name="T40">Views</text:span></text:span><text:span text:style-name="T40"> e </text:span><text:span text:style-name="Source_20_Text"><text:span text:style-name="T40">Reputation</text:span></text:span><text:span text:style-name="T40">).</text:span></text:p>
      <text:p text:style-name="P15"><text:span text:style-name="T51"><text:tab/>3.2.3) </text:span><text:span text:style-name="T52">Manutenção de Estado de Sessão:</text:span><text:span text:style-name="T40"> Atualizações de marcações temporárias voláteis utilizando </text:span><text:span text:style-name="Source_20_Text"><text:span text:style-name="T40">CURRENT_TIMESTAMP</text:span></text:span><text:span text:style-name="T40"> (ex: campos de </text:span><text:span text:style-name="Source_20_Text"><text:span text:style-name="T40">LastAccessDate</text:span></text:span><text:span text:style-name="T40"> e </text:span><text:span text:style-name="Source_20_Text"><text:span text:style-name="T40">LastActivityDate</text:span></text:span><text:span text:style-name="T40">).</text:span></text:p>
      <text:p text:style-name="P21"><text:span text:style-name="T48">3.3) Update</text:span><text:span text:style-name="T43"> por Chave Primária: Assim como nos cenários de exclusão, as atualizações aplicam filtros restritos baseados no identificador único dos registros.</text:span> Essa abordagem delimita o escopo da operação, forçando o uso do índice primário para a localização exata da linha antes do desencadeamento da escrita. </text:p>
      <text:p text:style-name="P19"/>
      <text:p text:style-name="P22" loext:marker-style-name="T18"><text:soft-page-break/><text:span text:style-name="T53">Operações de </text:span><text:span text:style-name="T54">Consultas</text:span><text:span text:style-name="T53"> de Dados: </text:span></text:p>
      <text:p text:style-name="P22" loext:marker-style-name="T18"><text:span text:style-name="T53"/></text:p>
      <text:h text:style-name="P23" text:outline-level="4"><text:span text:style-name="T55">1) </text:span>Cenário de Busca por Chave Primária</text:h>
      <text:p text:style-name="P24"><text:tab/>As operações de consulta por identificador único foram projetadas a partir de uma estratégia de varredura pontual e por intervalo sobre as tabelas originais da base de dados. O cenário foi estruturado com base nos seguintes critérios de construção:</text:p>
      <text:p text:style-name="P25"><text:span text:style-name="T56">1.1) </text:span><text:span text:style-name="T57">Estratégias de Predicação: Para mapear de forma abrangente o comportamento dos índices primários, as queries foram divididas em duas modalidades distintas de busca:</text:span></text:p>
      <text:p text:style-name="P25"><text:span text:style-name="T58"><text:tab/>1.1.1) </text:span><text:span text:style-name="T59">Seleção Pontual:</text:span><text:span text:style-name="T60"> Consultas exatas que efetuam a seleção de uma única linha aplicando o operador de igualdade direta sobre o ID indexado.</text:span></text:p>
      <text:p text:style-name="P26"><text:span text:style-name="T61"><text:tab/>1.1.2) </text:span><text:span text:style-name="T52">Seleção por Intervalo:</text:span><text:span text:style-name="T40"> Consultas consecutivas baseadas em janelas de amostragem que utilizam os operadores </text:span><text:span text:style-name="Source_20_Text"><text:span text:style-name="T40">BETWEEN</text:span></text:span><text:span text:style-name="T40"> e operadores relacionais compostos.</text:span></text:p>
      <text:p text:style-name="P27"><text:span text:style-name="T40">1.2) </text:span><text:span text:style-name="T39">Isolamento de Ambiente: O ciclo metodológico preserva o isolamento estrito através de scripts automatizados de criação e destruição (</text:span><text:span text:style-name="Source_20_Text"><text:span text:style-name="T39">DROP INDEX</text:span></text:span><text:span text:style-name="T39">), limpando completamente os índices de uma família antes de iniciar a outra.</text:span></text:p>
      <text:h text:style-name="P28" text:outline-level="4"><text:span text:style-name="T55">2) </text:span>Cenário de Busca por Chaves Não Primárias</text:h>
      <text:p text:style-name="P29"><text:tab/>As operações de consulta baseadas em atributos secundários foram projetadas a partir de <text:s/>índices secundários, <text:span text:style-name="T60">incorporando condições de seleção compostas por operadores lógicos (AND/OR).</text:span> O cenário foi estruturado com base nos seguintes critérios de construção:</text:p>
      <text:p text:style-name="P29"><text:span text:style-name="T62">2.1) </text:span><text:span text:style-name="T43">Estratégias de Predicação e Seleções Compostas: Para simular o comportamento de queries corporativas reais que não dependem do ID, as consultas foram desenhadas sob duas frentes de filtragem:</text:span></text:p>
      <text:p text:style-name="P29"><text:span text:style-name="T63"><text:tab/></text:span><text:span text:style-name="T64">2.1.1) </text:span><text:span text:style-name="T50">Filtros de Igualdade Simples e Concorrência de Cardinalidade:</text:span> Consultas exatas aplicadas sobre colunas categóricas ou textuais específicas.</text:p>
      <text:p text:style-name="P29"><text:span text:style-name="T64"><text:tab/>2.1.2) </text:span><text:span text:style-name="T50">Filtros Compostos e Janelas Temporais:</text:span> Consultas estruturadas com múltiplas condições lógicas correlacionadas.</text:p>
      <text:p text:style-name="P30"><text:span text:style-name="T65">2.2) Isolamento de Ambiente: O ciclo metodológico preserva o isolamento estrito através de scripts automatizados de criação e destruição (</text:span><text:span text:style-name="Source_20_Text"><text:span text:style-name="T66">DROP INDEX</text:span></text:span><text:span text:style-name="T65">), limpando completamente os índices de uma família antes de iniciar a outra.</text:span></text:p>
      <text:h text:style-name="P31" text:outline-level="4"><text:span text:style-name="T67">3) </text:span>Cenário de Busca por Estruturas com LIKE </text:h>
      <text:p text:style-name="P32"><text:span text:style-name="T32"><text:tab/>As operações de consulta baseadas no operador de correspondência de padrões lógicos (</text:span><text:span text:style-name="Source_20_Text"><text:span text:style-name="T32">LIKE</text:span></text:span><text:span text:style-name="T32">) foram projetadas a partir de uma estratégia de varredura textual parcial e análise de prefixos/sufixos sobre as tabelas originais da base de dados. O cenário foi estruturado com base nos seguintes critérios de construção:</text:span></text:p>
      <text:p text:style-name="P32"><text:span text:style-name="T68">3.1) </text:span><text:span text:style-name="T30">Estratégias de Casamento de Padrões: As queries foram intencionalmente categorizadas para explorar como a posição do caractere coringa afeta a capacidade do otimizador de utilizar estruturas de índice preexistentes:</text:span></text:p>
      <text:p text:style-name="P32"><text:span text:style-name="T69"><text:tab/>3.1.1) </text:span><text:span text:style-name="T70">Buscas por Prefixo Fixo:</text:span><text:span text:style-name="T32"> Consultas estruturadas com a constante no início da string.</text:span></text:p>
      <text:p text:style-name="P32"><text:span text:style-name="T71"><text:tab/>3.1.2) </text:span><text:span text:style-name="T70">Buscas por Sufixo:</text:span><text:span text:style-name="T32"> Consultas com coringas posicionados no início ou em ambas as extremidades da string.</text:span></text:p>
      <text:p text:style-name="P32"><text:soft-page-break/><text:span text:style-name="T71"><text:tab/>3.1.3) </text:span><text:span text:style-name="T70">Casamento de Casting:</text:span><text:span text:style-name="T32"> Consultas aplicadas a campos de data convertidos dinamicamente para texto.</text:span></text:p>
      <text:p text:style-name="P32"><text:span text:style-name="T68">3.2) </text:span><text:span text:style-name="T30">Isolamento de Ambiente: O ciclo metodológico preserva o isolamento estrito através de scripts automatizados de criação e destruição (</text:span><text:span text:style-name="Source_20_Text"><text:span text:style-name="T30">DROP INDEX</text:span></text:span><text:span text:style-name="T30">), limpando completamente os índices de uma família antes de iniciar a outra.</text:span><text:span text:style-name="T32"> </text:span></text:p>
      <text:h text:style-name="P33" text:outline-level="4" loext:marker-style-name="T18"><text:span text:style-name="T72">4) </text:span><text:span text:style-name="T73">Cenário de Busca com Junções (JOINS e Junções de Junções)</text:span></text:h>
      <text:p text:style-name="P34"><text:span text:style-name="T32"><text:tab/>As operações de consulta estruturadas por meio do acoplamento de tabelas relacionais (</text:span><text:span text:style-name="Source_20_Text"><text:span text:style-name="T32">INNER JOIN</text:span></text:span><text:span text:style-name="T32"> e </text:span><text:span text:style-name="Source_20_Text"><text:span text:style-name="T32">LEFT JOIN</text:span></text:span><text:span text:style-name="T32">) foram projetadas a partir de uma estratégia de correlação multidimensional entre as entidades da base de dados. O cenário foi estruturado com base nos seguintes critérios de construção:</text:span></text:p>
      <text:p text:style-name="P35"><text:span text:style-name="T74">4.1) </text:span><text:span text:style-name="T43">Complexidade e Topologia das Junções: As queries foram desenhadas para estressar os mecanismos de álgebra relacional através de dois níveis de acoplamento:</text:span></text:p>
      <text:p text:style-name="P35"><text:span text:style-name="T75"><text:tab/></text:span><text:span text:style-name="T76">4.1.1) </text:span><text:span text:style-name="T50">Junções Diretas de Chaves Estrangeiras (1 para N):</text:span> Consultas baseadas em relacionamentos diretos de tabelas filhas apontando para suas respectivas tabelas pai.</text:p>
      <text:p text:style-name="P35"><text:span text:style-name="T76">4.1.2) </text:span><text:span text:style-name="T50">Junções em Cadeia Encadeada (Junções de Junções):</text:span> Cenários de alta complexidade transacional que exigem o desempilhamento sequencial ou em paralelo de múltiplos níveis de tabelas.</text:p>
      <text:p text:style-name="P34"><text:span text:style-name="T77">4</text:span><text:span text:style-name="T68">.2) </text:span><text:span text:style-name="T30">Isolamento de Ambiente: O ciclo metodológico preserva o isolamento estrito através de scripts automatizados de criação e destruição (</text:span><text:span text:style-name="Source_20_Text"><text:span text:style-name="T30">DROP INDEX</text:span></text:span><text:span text:style-name="T30">), limpando completamente os índices de uma família antes de iniciar a outra.</text:span><text:span text:style-name="T32"> </text:span></text:p>
      <text:h text:style-name="P36" text:outline-level="4" loext:marker-style-name="T18"><text:span text:style-name="T78">5) </text:span><text:span text:style-name="T60">Cenário de Busca com Subconsultas </text:span></text:h>
      <text:p text:style-name="P37"><text:tab/>As operações de consulta baseadas em estruturas alinhadas e dependências lógicas internas (subconsultas) foram projetadas a partir de uma estratégia de isolamento e acoplamento dinâmico de blocos de instruções sobre as tabelas da base de dados. O cenário foi estruturado com base nos seguintes critérios de construção:</text:p>
      <text:p text:style-name="P37"><text:span text:style-name="T79">5.1) </text:span><text:span text:style-name="T43">Taxonomia e Posicionamento das Subconsultas: O ecossistema de testes foi fragmentado para cobrir as principais variações de aninhamento SQL utilizadas na literatura e em sistemas de produção:</text:span></text:p>
      <text:p text:style-name="P37"><text:span text:style-name="T80"><text:tab/></text:span><text:span text:style-name="T81">5.1.1) </text:span><text:span text:style-name="T50">Subconsultas Correlacionadas (Operador EXISTS):</text:span> Estruturas onde a consulta interna depende explicitamente de variáveis da consulta externa.</text:p>
      <text:p text:style-name="P37"><text:span text:style-name="T81"><text:tab/>5.1.2) </text:span><text:span text:style-name="T50">Subconsultas Independentes / Semi-Junções (Operadores IN e NOT IN):</text:span> Consultas que geram uma lista estática ou tabela temporária em memória para posterior filtragem no bloco principal.</text:p>
      <text:p text:style-name="P37"><text:span text:style-name="T81"><text:tab/>5.1.3) </text:span><text:span text:style-name="T50">Subconsultas Escalares Inline (Cláusula SELECT):</text:span> Projeções verticais que executam funções agregadas atômicas linha por linha.</text:p>
      <text:p text:style-name="P37"><text:span text:style-name="T81"><text:tab/>5.1.4) </text:span><text:span text:style-name="T50">Subconsultas como Tabelas Temporárias (Cláusula FROM):</text:span> Derivação de tabelas virtuais em lote para a consolidação de funções agregadas globais.</text:p>
      <text:p text:style-name="P38"><text:span text:style-name="T82">5</text:span><text:span text:style-name="T68">.2) </text:span><text:span text:style-name="T30">Isolamento de Ambiente: O ciclo metodológico preserva o isolamento estrito através de scripts automatizados de criação e destruição (</text:span><text:span text:style-name="Source_20_Text"><text:span text:style-name="T30">DROP INDEX</text:span></text:span><text:span text:style-name="T30">), limpando completamente os índices de uma família antes de iniciar a outra.</text:span><text:span text:style-name="T32"> </text:span></text:p>
      <text:p text:style-name="P39" loext:marker-style-name="T18"><text:span text:style-name="T60"/></text:p>
      <text:h text:style-name="P40" text:outline-level="4" loext:marker-style-name="T18"><text:soft-page-break/><text:span text:style-name="T83">6) </text:span><text:span text:style-name="T60">Cenário de Operações de Agrupamento e Agregações</text:span></text:h>
      <text:p text:style-name="P41"><text:span text:style-name="T32"><text:tab/>As operações de consulta baseadas em funções de agregação matemática e consolidação de conjuntos (</text:span><text:span text:style-name="Source_20_Text"><text:span text:style-name="T32">GROUP BY</text:span></text:span><text:span text:style-name="T32">, </text:span><text:span text:style-name="Source_20_Text"><text:span text:style-name="T32">HAVING</text:span></text:span><text:span text:style-name="T32"> e ordenação estatística) foram projetadas a partir de uma estratégia de compressão volumétrica e análise analítica de dados sobre as tabelas originais. O cenário foi estruturado com base nos seguintes critérios de construção:</text:span></text:p>
      <text:p text:style-name="P41"><text:span text:style-name="T84">6.1) </text:span><text:span text:style-name="T30">Diversidade de Métricas e Filtros Pós-Agrupamento: As queries foram desenhadas para estressar os motores de execução através de múltiplas camadas de funções computacionais combinadas:</text:span></text:p>
      <text:p text:style-name="P41"><text:span text:style-name="T85"><text:tab/></text:span><text:span text:style-name="T86">6.1.1) </text:span><text:span text:style-name="T70">Agregações de Distribuição e Alta Cardinalidade:</text:span><text:span text:style-name="T32"> Consultas focadas no cálculo simultâneo de volumetria (</text:span><text:span text:style-name="Source_20_Text"><text:span text:style-name="T32">COUNT</text:span></text:span><text:span text:style-name="T32">), médias aritméticas (</text:span><text:span text:style-name="Source_20_Text"><text:span text:style-name="T32">AVG</text:span></text:span><text:span text:style-name="T32">), somatórios fiscais (</text:span><text:span text:style-name="Source_20_Text"><text:span text:style-name="T32">SUM</text:span></text:span><text:span text:style-name="T32">) e limites operacionais (</text:span><text:span text:style-name="Source_20_Text"><text:span text:style-name="T32">MIN</text:span></text:span><text:span text:style-name="T32"> e </text:span><text:span text:style-name="Source_20_Text"><text:span text:style-name="T32">MAX</text:span></text:span><text:span text:style-name="T32">) aplicados sobre atributos de tabelas de alta densidade.</text:span></text:p>
      <text:p text:style-name="P41"><text:span text:style-name="T86"><text:tab/>6.1.2) </text:span><text:span text:style-name="T70">Predicação sob Conjuntos Consolidados (Cláusula HAVING):</text:span><text:span text:style-name="T32"> Inclusão de filtros restritivos aplicados estritamente após a fase de agrupamento.</text:span></text:p>
      <text:p text:style-name="P41"><text:span text:style-name="T86"><text:tab/>6.1.3) </text:span><text:span text:style-name="T70">Agregações com Contagem Distinta (COUNT DISTINCT):</text:span><text:span text:style-name="T32"> Consultas complexas criadas para identificar a volatilidade de chaves únicas dentro de uma mesma partição.</text:span></text:p>
      <text:p text:style-name="P41"><text:span text:style-name="T87">6</text:span><text:span text:style-name="T88">.2) </text:span><text:span text:style-name="T57">Isolamento de Ambiente: O ciclo metodológico preserva o isolamento estrito através de scripts automatizados de criação e destruição (</text:span><text:span text:style-name="Source_20_Text"><text:span text:style-name="T89">DROP INDEX</text:span></text:span><text:span text:style-name="T57">), limpando completamente os índices de uma família antes de iniciar a outra.</text:span><text:span text:style-name="T60"> </text:span></text:p>
      <text:p text:style-name="P10" loext:marker-style-name="T18"><text:span text:style-name="T25"/></text:p>
      <text:p text:style-name="P10" loext:marker-style-name="T24"><text:span text:style-name="T25"/></text:p>
      <text:p text:style-name="P10" loext:marker-style-name="T24"><text:span text:style-name="T25">2.2. Cenários Experimentais</text:span></text:p>
      <text:p text:style-name="P10" loext:marker-style-name="T24"><text:span text:style-name="T25"/></text:p>
      <text:p text:style-name="P10" loext:marker-style-name="T18"><text:span text:style-name="T22"><text:tab/>A fim de medir o impacto das estruturas de armazenamento e os caminhos de otimização adotados por cada SGBD, os testes foram subdivididos e isolados nos seguintes cenários:</text:span></text:p>
      <text:p text:style-name="P10" loext:marker-style-name="T18"><text:span text:style-name="T22"/></text:p>
      <text:list text:style-name="L1">
        <text:list-item>
          <text:p text:style-name="P42" loext:marker-style-name="T18"><text:span text:style-name="T90">Cenário Sem Índices: </text:span><text:span text:style-name="T91">Estado original do banco de dados pós-carga onde apenas as chaves primárias e restrições básicas de integridade possuem indexação nativa. Força a execução de buscas sequenciais completas (</text:span><text:span text:style-name="T92">Full Table Scans</text:span><text:span text:style-name="T91">) para atributos não-chave.</text:span></text:p>
        </text:list-item>
        <text:list-item>
          <text:p text:style-name="P42" loext:marker-style-name="T18"><text:span text:style-name="T90">Cenário com Índice Árvore B+: </text:span><text:span text:style-name="T91">Aplicação de estruturas do tipo Árvore B+ (padrão BTREE) nas colunas de busca não-chave mais frequentes, permitindo o particionamento de faixas de valores e acesso logarítmico.</text:span></text:p>
        </text:list-item>
        <text:list-item>
          <text:p text:style-name="P42" loext:marker-style-name="T18"><text:span text:style-name="T90">Cenário com Índice Hash: </text:span><text:span text:style-name="T91">Aplicação de indexação baseada em tabelas Hash nos atributos de busca exata, otimizando o acesso direto a registros de forma pontual.</text:span></text:p>
        </text:list-item>
        <text:list-item>
          <text:p text:style-name="P42" loext:marker-style-name="T18"><text:span text:style-name="T90">Cenário de Índice Não-Ideal: </text:span><text:span text:style-name="T91">Configuração deliberada de índices em colunas de baixa seletividade ou que não se alinham diretamente com os predicados da cláusula WHERE, servindo para demonstrar o custo e degradação provocados por erros de design.</text:span></text:p>
          <text:p text:style-name="P42" loext:marker-style-name="T18"><text:span text:style-name="T91"/></text:p>
        </text:list-item>
      </text:list>
      <text:p text:style-name="P10" loext:marker-style-name="T24"><text:span text:style-name="T25">2.3. Ambiente Computacional Usado</text:span></text:p>
      <text:p text:style-name="P10" loext:marker-style-name="T24"><text:span text:style-name="T25"/></text:p>
      <text:p text:style-name="P10" loext:marker-style-name="T18"><text:span text:style-name="T22"><text:tab/>Os experimentos foram realizados na mesma máquina para garantir que fatores físicos</text:span></text:p>
      <text:p text:style-name="P43" loext:marker-style-name="T18"><text:span text:style-name="T22">não distorcessem a comparação entre os sistemas. A infraestrutura consistiu em um processador 12th Gen Intel Core i7-12700H (2.30 GHz); 32GB </text:span><text:span text:style-name="T93">RAM; GPU 8GB - </text:span><text:span text:style-name="T22">NVIDIA GeForce RTX 3070 Ti; sob o sistema operacional Linux Ubuntu 22.04 LTS.</text:span></text:p>
      <text:p text:style-name="P43" loext:marker-style-name="T18"><text:span text:style-name="T22"/></text:p>
      <text:p text:style-name="P10" loext:marker-style-name="T18"><text:span text:style-name="T22"><text:tab/>Utilizou-se o</text:span><text:span text:style-name="T94"> PostgreSQL versão 15 e o MySQL versão 8.0. Para </text:span><text:span text:style-name="T22">a conexão com esses SGBDs e submissão automatizada das operações, foi desenvolvido um conjunto de scripts em Python utilizando psycopg2 para o PostgreSQL e mysql.connector para o MySQL. </text:span><text:span text:style-name="T93">F</text:span><text:span text:style-name="T22">o</text:span><text:span text:style-name="T93">ram</text:span><text:span text:style-name="T22"> disparada</text:span><text:span text:style-name="T93">s</text:span><text:span text:style-name="T22"> e cronometrada</text:span><text:span text:style-name="T93">s</text:span><text:span text:style-name="T94"> 20 vezes</text:span><text:span text:style-name="T22"> em cada cenário, limpando os buffers de cache concorrentes de modo a obter significância estatística estável.</text:span></text:p>
      <text:p text:style-name="P10" loext:marker-style-name="T18"><text:span text:style-name="T95"/></text:p>
      <text:p text:style-name="P10" loext:marker-style-name="T18"><text:soft-page-break/><text:span text:style-name="T95"/></text:p>
      <text:p text:style-name="P10" loext:marker-style-name="T23"><text:span text:style-name="T11">3. Resultados dos Experimentos</text:span></text:p>
      <text:p text:style-name="P10" loext:marker-style-name="T23"><text:span text:style-name="T11"/></text:p>
      <text:p text:style-name="P10" loext:marker-style-name="T18"><text:span text:style-name="T22"><text:tab/>Os dados brutos coletados ao longo das centenas de execuções automatizadas foram processados e sintetizados. A seguir, apresentam-se as tabelas de desempenho divididas por categorias de uso, exibindo os tempos médios calculados em segundos e seus respectivos desvios padrões, que quantificam a variabilidade do ambiente e do comportamento interno dos SGBDs.</text:span></text:p>
      <text:p text:style-name="P10" loext:marker-style-name="T18"><text:span text:style-name="T22"/></text:p>
      <text:p text:style-name="P10" loext:marker-style-name="T24"><text:span text:style-name="T25">3.1. Desempenho de Operações de Modificação de Dados (</text:span><text:span text:style-name="T96">DML</text:span><text:span text:style-name="T25">)</text:span></text:p>
      <text:p text:style-name="P10" loext:marker-style-name="T24"><text:span text:style-name="T25"/></text:p>
      <text:p text:style-name="P10" loext:marker-style-name="T18"><text:span text:style-name="T22"><text:tab/>As operações de escrita expõem a forma como o mecanismo de armazenamento de cada SGBD gerencia transações, travas e gravação em disco.</text:span></text:p>
      <text:p text:style-name="P10" loext:marker-style-name="T18"><text:span text:style-name="T22"/></text:p>
      <text:p text:style-name="P10" loext:marker-style-name="T18"><draw:frame draw:style-name="fr1" draw:name="Figura20" text:anchor-type="char" svg:width="17cm" svg:height="6.179cm" draw:z-index="15"><draw:image xlink:href="Pictures/100000010000062B0000023ED55EC76E.png" xlink:type="simple" xlink:show="embed" xlink:actuate="onLoad" draw:mime-type="image/png"/></draw:frame><text:span text:style-name="T22"/></text:p>
      <text:p text:style-name="P10" loext:marker-style-name="T97"><text:span text:style-name="T98"/></text:p>
      <text:p text:style-name="P10" loext:marker-style-name="T97"/>
      <text:p text:style-name="P44" loext:marker-style-name="T99"><draw:frame draw:style-name="fr2" draw:name="Figura3" text:anchor-type="char" svg:width="17cm" svg:height="8.419cm" draw:z-index="1"><draw:image xlink:href="Pictures/1000000100000565000002AC4D63A242.png" xlink:type="simple" xlink:show="embed" xlink:actuate="onLoad" draw:mime-type="image/png"/></draw:frame></text:p>
      <text:p text:style-name="P44" loext:marker-style-name="T99"><draw:frame draw:style-name="fr2" draw:name="Figura4" text:anchor-type="char" svg:width="17cm" svg:height="8.419cm" draw:z-index="2"><draw:image xlink:href="Pictures/1000000100000565000002AC9BD7ACD2.png" xlink:type="simple" xlink:show="embed" xlink:actuate="onLoad" draw:mime-type="image/png"/></draw:frame><text:soft-page-break/><text:span text:style-name="T100"/></text:p>
      <text:p text:style-name="P45" loext:marker-style-name="T99"><text:span text:style-name="T53"/></text:p>
      <text:p text:style-name="P45" loext:marker-style-name="T99"><text:span text:style-name="T53">Análise: </text:span></text:p>
      <text:p text:style-name="P46" loext:marker-style-name="T99"/>
      <text:h text:style-name="P47" text:outline-level="4">A) Cenário de Inserção (INSERT)</text:h>
      <text:p text:style-name="P48"><text:span text:style-name="T32"><text:tab/>No cenário de inserção pontual (onde os scripts inserem registros individuais simulando o encadeamento de integridade referencial), </text:span><text:span text:style-name="T30">o PostgreSQL foi cerca de duas vezes mais rápido que o MySQL, apresentando também uma </text:span><text:span text:style-name="T32">pegada de memória RAM significativamente menor (14,8 MB contra 32,6 MB).</text:span></text:p>
      <text:p text:style-name="P48"><text:span text:style-name="T32"><text:tab/></text:span><text:span text:style-name="T30">O MySQL armazena suas tabelas sob o paradigma de Tabelas Organizadas por Índice (Index-Organized Tables). Como as tabelas espelho foram geradas via </text:span><text:span text:style-name="Source_20_Text"><text:span text:style-name="T30">CREATE TABLE ... AS SELECT * WHERE 1=0</text:span></text:span><text:span text:style-name="T30">, e</text:span><text:span text:style-name="T32">las não herdaram chaves primárias explícitas. Diante disso, o mecanismo InnoDB é obrigado a gerar de forma sintética e incremental uma chave primária para manter o agrupamento físico da tabela. </text:span><text:span text:style-name="T101">Esse processo gera um overhead computacional de CPU.</text:span><text:span text:style-name="T32"> Além disso, cada inserção no InnoDB exige a escrita concorrente e a alocação de buffers específicos, elevando o consumo mínimo de RAM por thread de conexão.</text:span></text:p>
      <text:p text:style-name="P48"><text:span text:style-name="T32"><text:tab/>O PostgreSQL adota a arquitetura de </text:span><text:span text:style-name="T30">Tabelas Heap tradicionais</text:span><text:span text:style-name="T32">. As tuplas são inseridas de forma desordenada no primeiro espaço livre encontrado nas páginas de dados em disco. </text:span><text:span text:style-name="T102">O</text:span><text:span text:style-name="T32"> processo resume-se a fazer </text:span><text:span text:style-name="T103">a inclusão</text:span><text:span text:style-name="T32"> do registro e gravar uma entrada sequencial simplificada. Este comportamento puramente sequencial confere ao PostgreSQL uma velocidade superior em inserções em lote ou atômicas de baixa concorrência, além de exigir estruturas de memória bem mais enxutas por processo.</text:span></text:p>
      <text:p text:style-name="P48"><text:span text:style-name="T32"/></text:p>
      <text:h text:style-name="P47" text:outline-level="4">B) Cenários de Remoção (DELETE) e Alteração (UPDATE)</text:h>
      <text:p text:style-name="P49"><text:span text:style-name="T32"><text:tab/>Os resultados de </text:span><text:span text:style-name="Source_20_Text"><text:span text:style-name="T32">DELETE</text:span></text:span><text:span text:style-name="T32"> e </text:span><text:span text:style-name="Source_20_Text"><text:span text:style-name="T32">UPDATE</text:span></text:span><text:span text:style-name="T32"> exibem uma assimetria massiva: o MySQL levou segundos para completar as operações (9,63 s para deleção e 28,93 s para atualização), enquanto o PostgreSQL resolveu os mesmos scripts na casa dos milissegundos (0,023 s e 0,024 s). </text:span></text:p>
      <text:p text:style-name="P50"><text:span text:style-name="T32"><text:tab/>O MySQL utilizou a cláusula </text:span><text:span text:style-name="Source_20_Text"><text:span text:style-name="T32">INSERT IGNORE INTO ... SELECT * FROM ...</text:span></text:span><text:span text:style-name="T32"> para povoar as tabelas de teste. No ecossistema MySQL, a diretiva </text:span><text:span text:style-name="Source_20_Text"><text:span text:style-name="T32">IGNORE</text:span></text:span><text:span text:style-name="T32"> rebaixa erros de duplicidade a meros avisos. Como a tabela espelho não possuía restrições de unicidade, o MySQL populou com </text:span><text:soft-page-break/><text:span text:style-name="T32">sucesso </text:span><text:span text:style-name="T30">100% dos dados originais d</text:span><text:span text:style-name="T32">a produção nas tabelas espelho. Quando o </text:span><text:span text:style-name="Source_20_Text"><text:span text:style-name="T104">DELETE e UPDATE</text:span></text:span><text:span text:style-name="T32"> foram executados, eles dispararam comandos com filtros </text:span><text:span text:style-name="T104">no id</text:span><text:span text:style-name="T32">. No entanto, como as tabelas clonadas não possuía</text:span><text:span text:style-name="T30">m nenhum índice ou chave primária</text:span><text:span text:style-name="T32">, o Otimizador de Consultas do MySQL foi forçado a executar um</text:span><text:span text:style-name="T30"> Full Table Scan</text:span><text:span text:style-name="T32"> para cada instrução SQL. Visto que tabelas como </text:span><text:span text:style-name="Source_20_Text"><text:span text:style-name="T32">Posts</text:span></text:span><text:span text:style-name="T32">, </text:span><text:span text:style-name="Source_20_Text"><text:span text:style-name="T32">Comments</text:span></text:span><text:span text:style-name="T32"> e </text:span><text:span text:style-name="Source_20_Text"><text:span text:style-name="T32">Votes</text:span></text:span><text:span text:style-name="T32"> possuem alta volumetria, varrer sequencialmente milhões de linhas repetidas vezes </text:span><text:span text:style-name="T104">fez ele ser lento</text:span><text:span text:style-name="T32">.</text:span></text:p>
      <text:p text:style-name="P49"><text:span text:style-name="T32"><text:tab/>O PostgreSQL utilizou a sintaxe: </text:span><text:span text:style-name="Source_20_Text"><text:span text:style-name="T32">INSERT INTO ... SELECT * FROM ... ON CONFLICT DO NOTHING</text:span></text:span><text:span text:style-name="T32">. Na arquitetura do PostgreSQL, o mecanismo de avaliação de conflitos da cláusula </text:span><text:span text:style-name="Source_20_Text"><text:span text:style-name="T32">ON CONFLICT</text:span></text:span><text:span text:style-name="T32"> exige que a tabela alvo possua uma </text:span><text:span text:style-name="T30">restrição de integridade ativa</text:span><text:span text:style-name="T32"> (como uma </text:span><text:span text:style-name="Source_20_Text"><text:span text:style-name="T32">PRIMARY KEY</text:span></text:span><text:span text:style-name="T32"> ou uma </text:span><text:span text:style-name="Source_20_Text"><text:span text:style-name="T32">UNIQUE CONSTRAINT</text:span></text:span><text:span text:style-name="T32">) explicitada no dicionário de dados. Como as tabelas espelho foram geradas vazias por herança direta de atributos (</text:span><text:span text:style-name="Source_20_Text"><text:span text:style-name="T32">CREATE TABLE ... AS SELECT ... WHERE 1=0</text:span></text:span><text:span text:style-name="T32">), elas </text:span><text:span text:style-name="T30">não possuíam chaves nem restrições</text:span><text:span text:style-name="T32">. Como consequência direta dessa restrição, o interpretador do PostgreSQL abortou a instrução de inserção massiva, gerando tabelas com </text:span><text:span text:style-name="T30">zero linhas populadas</text:span><text:span text:style-name="T32">. Quando o </text:span><text:span text:style-name="Source_20_Text"><text:span text:style-name="T32">DELETE</text:span></text:span><text:span text:style-name="T32"> e </text:span><text:span text:style-name="Source_20_Text"><text:span text:style-name="T32">UPDATE</text:span></text:span><text:span text:style-name="T32"> foram executados, eles operaram sobre tabelas vazias. Uma varredura sequencial sobre tabelas com zero páginas alocadas é resolvida em microssegundos, justificando por que o tempo médio estabilizou-se em <text:s/>0,024 segundos.</text:span></text:p>
      <text:p text:style-name="P51"><text:span text:style-name="T105">C</text:span>aso as tabelas do PostgreSQL estivessem devidamente populadas e indexadas por chave primária, o comportamento algorítmico <text:span text:style-name="T105">seria</text:span> diferente:</text:p>
      <text:p text:style-name="P52">UPDATE</text:p>
      <text:p text:style-name="P53"><text:span text:style-name="T106"><text:tab/></text:span><text:span text:style-name="T30">O PostgreSQL sofreria severamente com a amplificação de escrita devido à sua arquitetura MVCC (Multi-Version Concurrency Control).</text:span><text:span text:style-name="T32"> No Postgres, uma instrução </text:span><text:span text:style-name="Source_20_Text"><text:span text:style-name="T32">UPDATE</text:span></text:span><text:span text:style-name="T32"> nunca sobrescreve o dado antigo; ela grava uma nova versão da tupla em um espaço vago da tabela Heap (um </text:span><text:span text:style-name="Source_20_Text"><text:span text:style-name="T32">DELETE</text:span></text:span><text:span text:style-name="T32"> lógico seguido de um </text:span><text:span text:style-name="Source_20_Text"><text:span text:style-name="T32">INSERT</text:span></text:span><text:span text:style-name="T32">). Isso obriga o SGBD a atualizar </text:span><text:span text:style-name="T70">todos</text:span><text:span text:style-name="T32"> os índices secundários da tabela para apontarem para o novo endereço físico, gerando fragmentação e exigindo o acionamento agressivo do </text:span><text:span text:style-name="Source_20_Text"><text:span text:style-name="T32">AUTOVACUUM</text:span></text:span><text:span text:style-name="T32">.</text:span></text:p>
      <text:p text:style-name="P54"><text:tab/><text:span text:style-name="T43">O MySQL (InnoDB) gerencia atualizações de forma In-Place.</text:span> Se o tamanho dos novos dados couber na página original da B+Tree, o InnoDB altera os bytes diretamente no nó folha do índice. Isso torna o update indexado do MySQL drasticamente mais eficiente em comparação ao PostgreSQL.</text:p>
      <text:p text:style-name="P55">DELETE</text:p>
      <text:p text:style-name="P53"><text:span text:style-name="T30"><text:tab/>No PostgreSQL, o </text:span><text:span text:style-name="Source_20_Text"><text:span text:style-name="T30">DELETE</text:span></text:span><text:span text:style-name="T30"> é uma operação de baixíssimo custo imediato: o motor altera apenas os bits de controle, marcando-a como morta.</text:span><text:span text:style-name="T32"> A limpeza real do bloco é delegada assincronamente ao processo de fundo.</text:span></text:p>
      <text:p text:style-name="P54"><text:tab/><text:span text:style-name="T43">No MySQL, a remoção física exige a exclusão do registro de dentro da estrutura encadeada da folha B+Tree.</text:span> Se a deleção de linhas contíguas esvaziar a página além do limiar configurado (geralmente 50%), o InnoDB dispara algoritmos síncronos de <text:span text:style-name="T105">merge,</text:span> exigindo a aquisição de travas exclusivas de escrita e reestruturação da árvore, o que <text:span text:style-name="T105">aumenta o tempo gasto</text:span>.</text:p>
      <text:p text:style-name="P54"/>
      <text:p text:style-name="P56">C) Análise da RAM</text:p>
      <text:p text:style-name="P57" loext:marker-style-name="T99"><text:span text:style-name="T40"><text:tab/>Os dados revelam </text:span><text:span text:style-name="T107">o uso</text:span><text:span text:style-name="T40"> de memória altamente estável para cada SGBD, com</text:span><text:span text:style-name="T39"> o MySQL operando com o dobro de consumo de RAM em comparação ao PostgreSQ</text:span><text:span text:style-name="T108">L. </text:span></text:p>
      <text:p text:style-name="P57" loext:marker-style-name="T99"><text:span text:style-name="T108"><text:tab/>O </text:span><text:span text:style-name="T32">MySQL gerencia conexões e execuções através de threads acopladas dentro de um único processo principal do servidor. Cada thread aloca, ao ser instanciada para processar uma </text:span><text:soft-page-break/><text:span text:style-name="T32">transação. O InnoDB aloca mapas internos adicionais para rastrear o estado da transação ativa e descritores de bloqueios lógicos diretamente associados ao contexto daquela thread. O </text:span><text:span text:style-name="T109">MySQL apresenta um consumo de RAM sistematicamente maior devido ao overhead de seu modelo de gerenciamento de transações, que requer buffers de sessão específicos <text:s/>e gerenciamento de transações ativas acopladas à thread.</text:span></text:p>
      <text:p text:style-name="P57" loext:marker-style-name="T99"><text:span text:style-name="T32"><text:tab/>O PostgreSQL adota uma arquitetura multiprocesso fork-based, onde cada conexão gera um processo independente no sistema operacional. Em operações DML atômicas, o processo filho opera de forma enxuta. Ele consome apenas a memória RAM necessária para realizar o </text:span><text:span text:style-name="T101">parsing</text:span><text:span text:style-name="T32"> sintático da query, gerar a árvore do plano de execução e rastrear o identificador da transação virtual. </text:span><text:span text:style-name="T109">O PostgreSQL demonstra alta eficiência de memória ao implementar um modelo MVCC integrado diretamente nas páginas de dados e ao centralizar o gerenciamento de buffers de escrita nos Shared Buffers globais, desonerando o processo isolado que computa as instruções DML.</text:span></text:p>
      <text:p text:style-name="P58" loext:marker-style-name="T99"/>
      <text:p text:style-name="P59" loext:marker-style-name="T99"/>
      <text:p text:style-name="P59" loext:marker-style-name="T24"><text:span text:style-name="T53">3.2. Desempenho de Consultas Simples e Filtragens</text:span></text:p>
      <text:p text:style-name="P59" loext:marker-style-name="T24"><text:span text:style-name="T53"/></text:p>
      <text:p text:style-name="P9" loext:marker-style-name="T18"><text:span text:style-name="T110"><text:tab/>As tabelas a seguir expõem a com</text:span>paração clássica de busca pontual e a influência direta da ativação de índices secundários Árvore B+ e Hash frente ao cenário sem indexação.</text:p>
      <text:p text:style-name="P9" loext:marker-style-name="T18"/>
      <text:p text:style-name="P9" loext:marker-style-name="T18"><draw:frame draw:style-name="fr2" draw:name="Figura19" text:anchor-type="char" svg:width="17cm" svg:height="8.348cm" draw:z-index="14"><draw:image xlink:href="Pictures/10000001000006360000030D3BB6A452.png" xlink:type="simple" xlink:show="embed" xlink:actuate="onLoad" draw:mime-type="image/png"/></draw:frame></text:p>
      <text:p text:style-name="P10" loext:marker-style-name="T18"><text:span text:style-name="T22"/></text:p>
      <text:p text:style-name="P10" loext:marker-style-name="T18"><draw:frame draw:style-name="fr3" draw:name="Figura2" text:anchor-type="char" svg:x="0cm" svg:y="0.113cm" svg:width="17cm" svg:height="5.981cm" draw:z-index="0"><draw:image xlink:href="Pictures/10000001000005D70000020EED40C8FF.png" xlink:type="simple" xlink:show="embed" xlink:actuate="onLoad" draw:mime-type="image/png"/></draw:frame><draw:frame draw:style-name="fr4" draw:name="Figura5" text:anchor-type="char" svg:width="17cm" svg:height="8.264cm" draw:z-index="3"><draw:image xlink:href="Pictures/100000010000057D000002AB95377B01.png" xlink:type="simple" xlink:show="embed" xlink:actuate="onLoad" draw:mime-type="image/png"/></draw:frame><text:soft-page-break/><text:span text:style-name="T22"/></text:p>
      <text:p text:style-name="P10" loext:marker-style-name="T97"><draw:frame draw:style-name="fr5" draw:name="Figura6" text:anchor-type="char" svg:width="17cm" svg:height="8.264cm" draw:z-index="4"><draw:image xlink:href="Pictures/100000010000057D000002AB3ABED639.png" xlink:type="simple" xlink:show="embed" xlink:actuate="onLoad" draw:mime-type="image/png"/></draw:frame><text:span text:style-name="T98"/></text:p>
      <text:p text:style-name="P10" loext:marker-style-name="T111"><text:span text:style-name="T95"/></text:p>
      <text:p text:style-name="P10" loext:marker-style-name="T111"><draw:frame draw:style-name="fr1" draw:name="Figura1" text:anchor-type="char" svg:width="17cm" svg:height="8.483cm" draw:z-index="16"><draw:image xlink:href="Pictures/100000010000063300000318ADDEC221.png" xlink:type="simple" xlink:show="embed" xlink:actuate="onLoad" draw:mime-type="image/png"/></draw:frame><text:soft-page-break/><text:span text:style-name="T95"/></text:p>
      <text:p text:style-name="P10" loext:marker-style-name="T111"><text:span text:style-name="T95"/></text:p>
      <text:p text:style-name="P10" loext:marker-style-name="T111"><text:span text:style-name="T95"/></text:p>
      <text:p text:style-name="P60" loext:marker-style-name="T97"><text:span text:style-name="T98">­</text:span><draw:frame draw:style-name="fr2" draw:name="Figura8" text:anchor-type="char" svg:width="17cm" svg:height="8.317cm" draw:z-index="5"><draw:image xlink:href="Pictures/1000000100000574000002ABC3F49B34.png" xlink:type="simple" xlink:show="embed" xlink:actuate="onLoad" draw:mime-type="image/png"/></draw:frame></text:p>
      <text:p text:style-name="P10" loext:marker-style-name="T99"><draw:frame draw:style-name="fr2" draw:name="Figura9" text:anchor-type="char" svg:width="17cm" svg:height="8.317cm" draw:z-index="6"><draw:image xlink:href="Pictures/1000000100000574000002AB82FC276C.png" xlink:type="simple" xlink:show="embed" xlink:actuate="onLoad" draw:mime-type="image/png"/></draw:frame><text:soft-page-break/><text:span text:style-name="T100"/></text:p>
      <text:p text:style-name="P10" loext:marker-style-name="T99"><text:span text:style-name="T100"/></text:p>
      <text:p text:style-name="P61" loext:marker-style-name="T99"><text:span text:style-name="T53">Análise: </text:span></text:p>
      <text:h text:style-name="P62" text:outline-level="2" loext:marker-style-name="T99"><text:span text:style-name="T112">A) </text:span>Chave Primária (Tabela 2)</text:h>
      <text:p text:style-name="P63"><text:tab/>As chaves primárias operaram na escala de milissegundos em ambos os sistemas 0,03 a 0,04s no MySQL e 0,04s a 0,05s no PostgreSQL, mas a variação de comportamento entre os índices adicionais revela fatos cruciais sobre a engenharia de cada motor.</text:p>
      <text:p text:style-name="P64"><text:span text:style-name="T32"><text:tab/>No </text:span><text:span text:style-name="T113">MySQL</text:span><text:span text:style-name="T32"> </text:span><text:span text:style-name="T113">(</text:span><text:span text:style-name="T32">InnoDB</text:span><text:span text:style-name="T113">)</text:span><text:span text:style-name="T32">, todas as </text:span><text:span text:style-name="T30">tabelas são obrigatoriamente Tabelas Organizadas por Índice (Index-Organized Tables - IOT)</text:span><text:span text:style-name="T32">. A chave primária padrão da tabela é o próprio índice. </text:span><text:span text:style-name="T113">Ao</text:span><text:span text:style-name="T32"> execut</text:span><text:span text:style-name="T113">ar</text:span><text:span text:style-name="T32"> a busca </text:span><text:span text:style-name="Source_20_Text"><text:span text:style-name="T32">WHERE Id = [valor]</text:span></text:span><text:span text:style-name="T32">, o otimizador do MySQL ignorou completamente qualquer índice secundário </text:span><text:span text:style-name="T113">e</text:span><text:span text:style-name="T32"> utilizou o índice primário nativo. Portanto, os quatro testes do MySQL mediram exatamente a mesma operação, justificando a estabilidade dos tempos.</text:span></text:p>
      <text:p text:style-name="P64"><text:span text:style-name="T114"><text:tab/></text:span><text:span text:style-name="T30">O PostgreSQL armazena dados em tabelas do tipo Heap e gerencia restrições de chave primária criando automaticamente um índice B-Tree único implicitamente.</text:span><text:span text:style-name="T32"> Ao buscar por </text:span><text:span text:style-name="Source_20_Text"><text:span text:style-name="T32">Id</text:span></text:span><text:span text:style-name="T32">, o Otimizador de Consultas do Postgres detectou que o índice de restrição nativo possuía seletividade perfeita. Assim, ele descartou os índices secundários criados nos scripts de teste e utilizou o índice primário nativo.</text:span></text:p>
      <text:p text:style-name="P51"><text:tab/><text:span text:style-name="T115">O uso de</text:span> memória manteve-se reduzida em ambos os sistemas 12MB a 13MB no PostgreSQL e 31MB a 33MB no MySQL, sem apresentar flutuações significativas entre os tipos de índices.</text:p>
      <text:p text:style-name="P65"><text:tab/>O<text:span text:style-name="T116"> PostgreSQL adota uma arquitetura baseada em Processos Independentes, onde cada conexão gera um processo isolado do sistema operacional. </text:span><text:span text:style-name="T117">É</text:span><text:span text:style-name="T116"> arquiteturalmente mais econômico em memória privada, pois seu modelo multiprocesso mantém os processos filhos limpos, centralizando os dados nos buffers globais. </text:span></text:p>
      <text:p text:style-name="P49"><text:span text:style-name="T32"><text:tab/></text:span><text:span text:style-name="T30">O MySQL opera sob o modelo de Thread Única por Conexão.</text:span><text:span text:style-name="T32"> Embora threads compartilhem o mesmo espaço de endereçamento global do processo pai, o MySQL reserva uma série de buffers privados para cada thread assim que uma operação de query é iniciada.</text:span></text:p>
      <text:h text:style-name="P66" text:outline-level="2"><text:soft-page-break/><text:span text:style-name="T112">B)</text:span> Chave Não-Primária (Tabela 3)</text:h>
      <text:p text:style-name="P51"><text:span text:style-name="T118"><text:tab/>A</text:span> busca avaliou filtros aplicados sobre atributos secundários (como strings de localização ou contagens de reputação). <text:span text:style-name="T118">A</text:span>s diferenças de arquitetura de algoritmos tornaram-se severas, o MySQL <text:s/>6,13s a 10,96s e o PostgreSQL <text:s/>3,16s a 3,27s.</text:p>
      <text:p text:style-name="P67"><text:span text:style-name="T32"><text:tab/></text:span><text:span text:style-name="T30">O único cenário em que o MySQL conseguiu reduzir significativamente seu tempo de execução nas chaves não-primárias foi com o Apoio de Índice Árvore B+ (6,13s), comparado ao cenário Sem Índices (10,96s). </text:span><text:span text:style-name="T32">No InnoDB, um índice secundário não armazena ponteiros físicos para o disco, mas sim o valor da chave primária correspondente. Quando a query buscou por um atributo não-chave indexado por B+Tree, o MySQL percorreu a árvore secundária, coletou o </text:span><text:span text:style-name="Source_20_Text"><text:span text:style-name="T32">Id</text:span></text:span><text:span text:style-name="T32"> associado e, para cada linha correspondente, realizou uma nova busca completa na árvore. </text:span><text:span text:style-name="T119">E</text:span><text:span text:style-name="T32">sse processo reduz o custo de um </text:span><text:span text:style-name="T109">Full Table Scan</text:span><text:span text:style-name="T32"> (10,96s) para um acesso focado (6,13s), mas gera alta concorrência de leitura nas páginas d</text:span><text:span text:style-name="T30">e memória. </text:span><text:span text:style-name="T120">O Í</text:span><text:span text:style-name="T30">ndice Hash (10,78s) e o Índice Hash Não-Ideal (10,84s) apresentaram tempos idênticos ao cenário Sem Índices (10,96s) no MySQL. </text:span><text:span text:style-name="T32">O mecanismo de armazenamento padrão do M</text:span><text:span text:style-name="T30">ySQL (InnoDB) não possui suporte físico a índices Hash criados pelo usuário</text:span><text:span text:style-name="T121">,</text:span><text:span text:style-name="T32"> </text:span><text:span text:style-name="T122">então fez</text:span><text:span text:style-name="T32"> um </text:span><text:span text:style-name="T101">Full Table Scan, </text:span><text:span text:style-name="T123">por ser</text:span><text:span text:style-name="T124"> mais rápido</text:span><text:span text:style-name="T32">, resultando nos mesmos 10,8s.</text:span></text:p>
      <text:p text:style-name="P68"><text:span text:style-name="T125"><text:tab/>O</text:span><text:span text:style-name="T43"> PostgreSQL manteve uma estabilidade impressionante: todos os cinco cenários cravaram tempos na janela estrita de 3,16s a 3,27s. </text:span>Quando um índice secundário (B-Tree ou Hash nativo do Postgres) é acionado sob um volume considerável de dados, o otimizador do PostgreSQL evita fazer saltos aleatórios ao Heap linha por linha. Em vez disso, o Postgres ativa o algoritmo de <text:span text:style-name="T43">Bitmap Index Scan. As estatísticas mostram que o cenário Sem Índices (3,16s) foi o mais rápido de todos no PostgreSQL.</text:span> <text:span text:style-name="T116">O Planejador Baseado em Custo (CBO) </text:span><text:span text:style-name="T43">preferiu realizar um Sequential Scan puro em todas as rodadas.</text:span> Como a leitura sequencial maximiza o desempenho do barramento, o Postgres superou a performance do MySQL por uma margem de 2x a 3x.</text:p>
      <text:p text:style-name="P69"><text:span text:style-name="T32"><text:tab/></text:span><text:span text:style-name="T126">Sobre o uso de RAM, o</text:span><text:span text:style-name="T32"> MySQL </text:span><text:span text:style-name="T126">teve </text:span><text:span text:style-name="T32">1,58GB </text:span><text:span text:style-name="T126">e o</text:span><text:span text:style-name="T32"> PostgreSQL 1,74GB. </text:span></text:p>
      <text:p text:style-name="P69"><text:span text:style-name="T32"><text:tab/>O salto de memória do MySQL deve-se ao escopo da query filtrando atributos secundários de tabelas de alta volumetria. </text:span><text:span text:style-name="T126">Também d</text:span><text:span text:style-name="T32">evido a travas e restrições rígidas de configuração de tabelas temporárias, paginando o excesso em disco. <text:s/></text:span></text:p>
      <text:p text:style-name="P69"><text:span text:style-name="T32"><text:tab/>O PostgreSQL </text:span><text:span text:style-name="T126">tem um</text:span><text:span text:style-name="T32"> otimizador de custos em cenários de alta volumetria. </text:span><text:span text:style-name="T126">A</text:span><text:span text:style-name="T32">loca uma quantidade superior de RAM para manter a estrutura de dados e as tabelas hash/bitmaps de blocos na memória.</text:span></text:p>
      <text:p text:style-name="P59" loext:marker-style-name="T111"/>
      <text:p text:style-name="P10" loext:marker-style-name="T24"><text:span text:style-name="T25">3.3. Desempenho de Consultas Complexas (Junções, Subconsultas e Agrupamentos)</text:span></text:p>
      <text:p text:style-name="P10" loext:marker-style-name="T24"><text:span text:style-name="T25"/></text:p>
      <text:p text:style-name="P10" loext:marker-style-name="T18"><text:span text:style-name="T22"><text:tab/>Esta subseção consolida os testes com maior nível de complexidade computacional, envolvendo processamento aritmético e cruzamento de grandes coleções de registros.</text:span></text:p>
      <text:p text:style-name="P10" loext:marker-style-name="T18"><draw:frame draw:style-name="fr2" draw:name="Figura7" text:anchor-type="char" svg:width="17cm" svg:height="7.828cm" draw:z-index="17"><draw:image xlink:href="Pictures/1000000100000658000002EC5A55701D.png" xlink:type="simple" xlink:show="embed" xlink:actuate="onLoad" draw:mime-type="image/png"/></draw:frame><text:soft-page-break/><text:span text:style-name="T22"/></text:p>
      <text:p text:style-name="P10" loext:marker-style-name="T97"><text:span text:style-name="T98"/></text:p>
      <text:p text:style-name="P10" loext:marker-style-name="T97"><draw:frame draw:style-name="fr5" draw:name="Figura11" text:anchor-type="char" svg:width="17cm" svg:height="8.34cm" draw:z-index="7"><draw:image xlink:href="Pictures/1000000100000572000002AC2169BF9F.png" xlink:type="simple" xlink:show="embed" xlink:actuate="onLoad" draw:mime-type="image/png"/></draw:frame><text:span text:style-name="T98"/></text:p>
      <text:p text:style-name="P10" loext:marker-style-name="T97"><text:span text:style-name="T98"/></text:p>
      <text:p text:style-name="P10" loext:marker-style-name="T97"><text:span text:style-name="T98"/></text:p>
      <text:p text:style-name="P10" loext:marker-style-name="T97"><text:span text:style-name="T98"/></text:p>
      <text:p text:style-name="P10" loext:marker-style-name="T97"><text:span text:style-name="T98"/></text:p>
      <text:p text:style-name="P10" loext:marker-style-name="T97"><text:span text:style-name="T98"/></text:p>
      <text:p text:style-name="P10" loext:marker-style-name="T97"><draw:frame draw:style-name="fr2" draw:name="Figura12" text:anchor-type="char" svg:width="17cm" svg:height="8.34cm" draw:z-index="8"><draw:image xlink:href="Pictures/1000000100000572000002AC97F9C29E.png" xlink:type="simple" xlink:show="embed" xlink:actuate="onLoad" draw:mime-type="image/png"/></draw:frame><text:soft-page-break/><text:span text:style-name="T98"/></text:p>
      <text:p text:style-name="P10" loext:marker-style-name="T97"><text:span text:style-name="T98"/></text:p>
      <text:p text:style-name="P70" loext:marker-style-name="T97"><draw:frame draw:style-name="fr1" draw:name="Figura10" text:anchor-type="char" svg:width="17cm" svg:height="7.417cm" draw:z-index="18"><draw:image xlink:href="Pictures/100000010000064B000002BF2E4D6B9F.png" xlink:type="simple" xlink:show="embed" xlink:actuate="onLoad" draw:mime-type="image/png"/></draw:frame><draw:frame draw:style-name="fr3" draw:name="Figura21" text:anchor-type="char" svg:x="2.341cm" svg:y="7.116cm" svg:width="12.321cm" svg:height="0.677cm" draw:z-index="19"><draw:image xlink:href="Pictures/10000001000004F60000004C87EA1F46.png" xlink:type="simple" xlink:show="embed" xlink:actuate="onLoad" draw:mime-type="image/png"/></draw:frame><text:span text:style-name="T98"/></text:p>
      <text:p text:style-name="P10" loext:marker-style-name="T97"><draw:frame draw:style-name="fr3" draw:name="Figura13" text:anchor-type="char" svg:x="0cm" svg:y="0.333cm" svg:width="17cm" svg:height="8.352cm" draw:z-index="9"><draw:image xlink:href="Pictures/1000000100000570000002AC12181349.png" xlink:type="simple" xlink:show="embed" xlink:actuate="onLoad" draw:mime-type="image/png"/></draw:frame><text:span text:style-name="T98"/></text:p>
      <text:p text:style-name="P10" loext:marker-style-name="T97"><text:soft-page-break/><text:span text:style-name="T98"/></text:p>
      <text:p text:style-name="P10" loext:marker-style-name="T97"><text:span text:style-name="T98"/></text:p>
      <text:p text:style-name="P10" loext:marker-style-name="T97"><text:span text:style-name="T98"/></text:p>
      <text:p text:style-name="P10" loext:marker-style-name="T97"><draw:frame draw:style-name="fr2" draw:name="Figura14" text:anchor-type="char" svg:width="17cm" svg:height="8.352cm" draw:z-index="10"><draw:image xlink:href="Pictures/1000000100000570000002ACB493D24C.png" xlink:type="simple" xlink:show="embed" xlink:actuate="onLoad" draw:mime-type="image/png"/></draw:frame><text:span text:style-name="T98"/></text:p>
      <text:p text:style-name="P10" loext:marker-style-name="T97"><text:span text:style-name="T98"/></text:p>
      <text:p text:style-name="P10" loext:marker-style-name="T97"><draw:frame draw:style-name="fr2" draw:name="Figura22" text:anchor-type="char" svg:width="17cm" svg:height="8.054cm" draw:z-index="20"><draw:image xlink:href="Pictures/1000000100000642000002F7EC3BDBBE.png" xlink:type="simple" xlink:show="embed" xlink:actuate="onLoad" draw:mime-type="image/png"/></draw:frame><text:span text:style-name="T98"/></text:p>
      <text:p text:style-name="P10" loext:marker-style-name="T97"><text:span text:style-name="T98"/></text:p>
      <text:p text:style-name="P10" loext:marker-style-name="T97"><draw:frame draw:style-name="fr2" draw:name="Figura15" text:anchor-type="char" svg:width="17cm" svg:height="8.359cm" draw:z-index="11"><draw:image xlink:href="Pictures/100000010000056F000002AC14714438.png" xlink:type="simple" xlink:show="embed" xlink:actuate="onLoad" draw:mime-type="image/png"/></draw:frame><text:soft-page-break/><text:span text:style-name="T98"/></text:p>
      <text:p text:style-name="P71" loext:marker-style-name="T99"><draw:frame draw:style-name="fr1" draw:name="Figura16" text:anchor-type="char" svg:width="17cm" svg:height="8.359cm" draw:z-index="12"><draw:image xlink:href="Pictures/100000010000056F000002AC08BE2F6F.png" xlink:type="simple" xlink:show="embed" xlink:actuate="onLoad" draw:mime-type="image/png"/></draw:frame><text:span text:style-name="T53"/></text:p>
      <text:p text:style-name="P59" loext:marker-style-name="T99"><text:span text:style-name="T53"/></text:p>
      <text:p text:style-name="P59" loext:marker-style-name="T99"><text:span text:style-name="T53"/></text:p>
      <text:p text:style-name="P59" loext:marker-style-name="T99"><text:span text:style-name="T53"/></text:p>
      <text:p text:style-name="P59" loext:marker-style-name="T99"><draw:frame draw:style-name="fr1" draw:name="Figura23" text:anchor-type="char" svg:width="17cm" svg:height="8.153cm" draw:z-index="21"><draw:image xlink:href="Pictures/100000010000063D000002FEE2834327.png" xlink:type="simple" xlink:show="embed" xlink:actuate="onLoad" draw:mime-type="image/png"/></draw:frame><text:soft-page-break/><text:span text:style-name="T53"/></text:p>
      <text:p text:style-name="P59" loext:marker-style-name="T99"><text:span text:style-name="T53"/></text:p>
      <text:p text:style-name="P59" loext:marker-style-name="T99"><draw:frame draw:style-name="fr1" draw:name="Figura24" text:anchor-type="char" svg:width="17cm" svg:height="8.322cm" draw:z-index="22"><draw:image xlink:href="Pictures/1000000100000573000002ABB980FFFF.png" xlink:type="simple" xlink:show="embed" xlink:actuate="onLoad" draw:mime-type="image/png"/></draw:frame><text:span text:style-name="T53"/></text:p>
      <text:p text:style-name="P59" loext:marker-style-name="T99"><text:span text:style-name="T53"/></text:p>
      <text:p text:style-name="P59" loext:marker-style-name="T99"><draw:frame draw:style-name="fr1" draw:name="Figura18" text:anchor-type="char" svg:width="17cm" svg:height="8.322cm" draw:z-index="13"><draw:image xlink:href="Pictures/1000000100000573000002AB89CB4101.png" xlink:type="simple" xlink:show="embed" xlink:actuate="onLoad" draw:mime-type="image/png"/></draw:frame><text:soft-page-break/><text:span text:style-name="T53"/></text:p>
      <text:p text:style-name="P59" loext:marker-style-name="T99"><text:span text:style-name="T53"/></text:p>
      <text:p text:style-name="P72" loext:marker-style-name="T99"><text:span text:style-name="T53">Análise: </text:span></text:p>
      <text:p text:style-name="P72" loext:marker-style-name="T99"><text:span text:style-name="T53"/></text:p>
      <text:h text:style-name="P66" text:outline-level="2"><text:span text:style-name="T127">A) </text:span>Operações de Agrupamento e Agregações (Tabela 4)</text:h>
      <text:p text:style-name="P51">PostgreSQL 14,2s a 14,5s | MySQL 472,7s a 478,3s </text:p>
      <text:p text:style-name="P51"><text:tab/>Este cenário apresenta a maior assimetria. O PostgreSQL conclui as queries em constantes 14 segundos, enquanto o MySQL extrapola para a casa dos 7 minutos.</text:p>
      <text:p text:style-name="P73"><text:span text:style-name="T43"><text:tab/>O PostgreSQL utiliza um planejador baseado em custo (CBO). Se o conjunto estimado de chaves de agrupamento couber na RAM, o Postgres ativa o algoritmo HashAggregate. </text:span><text:span text:style-name="T116">Mesmo nos cenários Sem Index ou com Índice Hash, o tempo se manteve em 14 segundos porque a criação de índices secundários em disco não altera a eficiência do HashAggregate interno em memória RAM, que processa os dados de forma massiva após o Sequential Scan.</text:span></text:p>
      <text:p text:style-name="P51"><text:tab/>O MySQL (InnoDB) exibe severas limitações arquiteturais ao processar agregações complexas. Historicamente, o otimizador do MySQL prioriza cargas de trabalho transacionais rápidos. <text:span text:style-name="T43">Na ausência de um índice perfeitamente ajustado e ordenado cobrindo os campos de agrupamento e filtragem, o motor recorre ao algoritmo de Group-by com Ordenação Implícita.</text:span></text:p>
      <text:p text:style-name="P69"><text:span text:style-name="T109">MySQL 1,58GB} | PostgreSQL 1,74GB} </text:span><text:span text:style-name="T128">a</text:span><text:span text:style-name="T109"> 1,83GB</text:span></text:p>
      <text:p text:style-name="P74"><text:span text:style-name="T109"><text:tab/></text:span><text:span text:style-name="T32">O consumo do MySQL t</text:span><text:span text:style-name="T126">em um</text:span><text:span text:style-name="T32"> componente de gerenciamento de tabelas de memória interna. Para resolver as cláusulas </text:span><text:span text:style-name="Source_20_Text"><text:span text:style-name="T32">GROUP BY</text:span></text:span><text:span text:style-name="T32"> e </text:span><text:span text:style-name="Source_20_Text"><text:span text:style-name="T32">HAVING</text:span></text:span><text:span text:style-name="T32"> sobre tabelas sem ordenação ideal em disco, o MySQL aloca RAM para consolidar as chaves de agregação. </text:span><text:span text:style-name="T129">E</text:span><text:span text:style-name="T32">stour</text:span><text:span text:style-name="T129">a</text:span><text:span text:style-name="T32"> do limite máximo permitido pela variável, </text:span><text:span text:style-name="T129">a</text:span><text:span text:style-name="T32">o atingir esse limite, o motor congela a expansão de RAM da thread e delega o excedente a arquivos físicos temporários em disco.</text:span></text:p>
      <text:p text:style-name="P74"><text:span text:style-name="T32"><text:tab/>O PostgreSQL </text:span><text:span text:style-name="T129">d</text:span><text:span text:style-name="T32">iante de agregações massivas, o Otimizador Baseado em Custo (CBO) ativa o algoritmo </text:span><text:span text:style-name="T30">HashAggregate</text:span><text:span text:style-name="T32">. O Postgres calcula a quantidade de memória de trabalho <text:s/>necessária para criar extensas tabelas hash em memória RAM volátil. O SGBD prefere expandir agressivamente a pegada de memória do processo filho para acomodar os acumuladores matemáticos (</text:span><text:span text:style-name="Source_20_Text"><text:span text:style-name="T32">COUNT</text:span></text:span><text:span text:style-name="T32">, </text:span><text:span text:style-name="Source_20_Text"><text:span text:style-name="T32">SUM</text:span></text:span><text:span text:style-name="T32">, </text:span><text:span text:style-name="Source_20_Text"><text:span text:style-name="T32">AVG</text:span></text:span><text:span text:style-name="T32">), evitando o gargalo de escrita em disco e resolvendo a operação em escassos 14 segundos.</text:span></text:p>
      <text:p text:style-name="P51"><text:soft-page-break/><text:span text:style-name="T43"/></text:p>
      <text:h text:style-name="P66" text:outline-level="2"><text:span text:style-name="T130">B)</text:span> Filtragem Parcial Textual com Cláusula LIKE (Tabela 5)</text:h>
      <text:p text:style-name="P75">PostgreSQL 16,7s a 17,0s | MySQL 28,9s a 29,0s</text:p>
      <text:p text:style-name="P49"><text:span text:style-name="T32"><text:tab/>Neste cenário, avaliou-se o casamento de padrões de strings utilizando o caractere coringa (</text:span><text:span text:style-name="Source_20_Text"><text:span text:style-name="T32">%</text:span></text:span><text:span text:style-name="T32">). Ambos os SGBDs mantiveram tempos estáticos e lineares em todas as suas respectivas vertentes de indexação, demonstrando a invalidação completa de índices tradicionais. O posicionamento central ou inicial do caractere coringa (ex: </text:span><text:span text:style-name="Source_20_Text"><text:span text:style-name="T32">LIKE '%database%'</text:span></text:span><text:span text:style-name="T32"> ou </text:span><text:span text:style-name="Source_20_Text"><text:span text:style-name="T32">LIKE '%Silva'</text:span></text:span><text:span text:style-name="T32">) impede qualquer navegação hierárquica em estruturas indexadas padrão.</text:span></text:p>
      <text:p text:style-name="P76"><text:span text:style-name="T32"><text:tab/>O PostgreSQL superou o MySQL em aproximadamente 1,7 vezes (16,9s contra 29,0s). </text:span><text:span text:style-name="T30">Esse ganho decorre da eficiência do motor de armazenamento na leitura de páginas Heap sequenciais e do suporte nativo a Varreduras Sequenciais Paralelas.</text:span><text:span text:style-name="T32"> O Postgres divide o arquivo de dados em blocos e distribui a leitura e a checagem lógica das strings do </text:span><text:span text:style-name="Source_20_Text"><text:span text:style-name="T32">LIKE</text:span></text:span><text:span text:style-name="T32"> entre múltiplos núcleos de CPU. </text:span></text:p>
      <text:p text:style-name="P77"><text:tab/>O MySQL/InnoDB, operando em threads de execução mais acopladas por query, processa a varredura linear de forma mais lenta, sofrendo também com o maior tamanho de página padrão do InnoDB (16KB) ao manipular colunas do tipo texto longo.</text:p>
      <text:p text:style-name="P78">MySQL 815 a 839MB | PostgreSQL 1,25GB</text:p>
      <text:p text:style-name="P79"><text:span text:style-name="T131"><text:tab/>O</text:span><text:span text:style-name="T32"> MySQL processa a query de forma linear através de uma única thread de execução, o consumo de RAM privada restringe-se ao espaço alocado para carregar os blocos textuais da tabela para análise e gerenciar o buffer de envio de resultados para o cliente. </text:span><text:span text:style-name="T132">Teve um c</text:span><text:span text:style-name="T32">omportamento puramente transacional de leitura sequencial sem o uso de hashing auxiliar em memória.</text:span></text:p>
      <text:p text:style-name="P79"><text:span text:style-name="T32"><text:tab/></text:span><text:span text:style-name="T133">O</text:span><text:span text:style-name="T30"> PostgreSQL </text:span><text:span text:style-name="T133">teve um</text:span><text:span text:style-name="T30"> incremento de memória, reflexo direto da ativação do algoritmo de Varredura Sequencial Paralela.</text:span><text:span text:style-name="T32"> Para ler e avaliar as strings contidas nas colunas de texto longo, o processo principal recruta múltiplos processos trabalhadores. Cada </text:span><text:span text:style-name="T101">worker</text:span><text:span text:style-name="T32"> gerencia seu próprio buffer de paginação e estado lógico de processamento de strings. O somatório das áreas de memória privada desses processos paralelos infla a estatística global de RAM da sessão, mas confere ao PostgreSQL uma velocidade de processamento </text:span><text:span text:style-name="T132">maior</text:span><text:span text:style-name="T32">.</text:span></text:p>
      <text:h text:style-name="P66" text:outline-level="2"><text:span text:style-name="T134">C)</text:span> Processamento de Junções Estruturais - JOINS (Tabela 6)</text:h>
      <text:p text:style-name="P51"><text:tab/>O cenário de junções exibe um equilíbrio competitivo notável entre os dois sistemas, com os tempos flutuando na janela de 56 a 64 segundos. </text:p>
      <text:p text:style-name="P51"><text:tab/>O PostgreSQL avalia três algoritmos principais de junção:<text:span text:style-name="T20"> Nested Loop, Merge Join e Hash Join. </text:span><text:span text:style-name="T116">Na</text:span><text:span text:style-name="T43">s consultas que cruzam tabelas de alta densidade sem predicados altamente seletivos, o Postgres prioriza o Hash Join.</text:span></text:p>
      <text:p text:style-name="P51"><text:tab/><text:span text:style-name="T43">O MySQL resolve junções através do algoritmo Nested Loop Join.</text:span></text:p>
      <text:p text:style-name="P80"><text:span text:style-name="T109">MySQL 1,58GB | PostgreSQL 1,73GB </text:span><text:span text:style-name="T135">a </text:span><text:span text:style-name="T109">1,79GB</text:span></text:p>
      <text:p text:style-name="P80"><text:span text:style-name="T109"><text:tab/></text:span><text:span text:style-name="T135">No</text:span><text:span text:style-name="T109"> MySQL quando a query realiza junções complexas sem o amparo de chaves primárias ou B+Trees ideais, o motor substitui o laço aninhado clássico pelo algoritmo de Hash Join. Para isso, ele consome RAM privada delimitada para criar tabelas hash temporárias em memória. Novamente, a volumetria excessiva fez o mecanismo colidir com a barreira máxima do alocador </text:span><text:span text:style-name="Source_20_Text"><text:span text:style-name="T109">TempTable</text:span></text:span><text:span text:style-name="T109">, forçando a estabilização do consumo no teto.</text:span></text:p>
      <text:p text:style-name="P80"><text:span text:style-name="T109"><text:tab/></text:span><text:span text:style-name="T135">No</text:span><text:span text:style-name="T30"> PostgreSQL </text:span><text:span text:style-name="T136">q</text:span><text:span text:style-name="T30">uando há índices disponíveis nas chaves estrangeiras, o otimizador frequentemente combina algoritmos de Nested Loop com Index Scan ou Merge Join (que exige </text:span><text:soft-page-break/><text:span text:style-name="T30">ordenação prévia das fatias).</text:span><text:span text:style-name="T32"> Para coordenar a fusão de múltiplos fluxos indexados vindos de tabelas concorrentes, o motor expande dinamicamente a alocação de buffers de classificação em memória RAM.</text:span></text:p>
      <text:p text:style-name="P49"><text:span text:style-name="T30"/></text:p>
      <text:h text:style-name="P66" text:outline-level="2"><text:span text:style-name="T134">D)</text:span> Resolução de Subconsultas Aninhadas (Tabela 7)</text:h>
      <text:p text:style-name="P75">PostgreSQL <text:s/>0,77s a 1,18s | MySQL <text:s/>8,73s a 10,08s</text:p>
      <text:p text:style-name="P51"><text:tab/>No processamento de subconsultas lógica<text:span text:style-name="T43">s, o PostgreSQL demonstrou uma superioridade de até 10 vezes em relação ao MySQL.</text:span></text:p>
      <text:p text:style-name="P49"><text:span text:style-name="T137"><text:tab/>O</text:span><text:span text:style-name="T32"> </text:span><text:span text:style-name="T30">PostgreSQL possui um otimizador extensivo que aplica regras de Desaninhamento </text:span><text:span text:style-name="T32"><text:s/>antes de computar o plano físico. Ao analisar operadores como </text:span><text:span text:style-name="Source_20_Text"><text:span text:style-name="T32">IN</text:span></text:span><text:span text:style-name="T32"> ou </text:span><text:span text:style-name="Source_20_Text"><text:span text:style-name="T32">EXISTS</text:span></text:span><text:span text:style-name="T32">, o Postgres trans</text:span><text:span text:style-name="T30">forma algoritmicamente a subconsulta em uma estrutura equivalente de Semi-Join ou Anti-Join. </text:span><text:span text:style-name="T101">Uma vez convertida em Semi-Join, a query passa a ser tratada com a mesma eficiência de um Hash Join plano em memória RAM.</text:span><text:span text:style-name="T32"> Nos cenários indexados por B+Tree ou Hash, o motor utiliza os índices internos de forma atômica para validar os conjuntos rapidamente. </text:span><text:span text:style-name="T30">No cenário Sem Index, o tempo sobe ligeiramente, provando que a reescrita lógica mitiga a ausência de caminhos físicos auxiliados.</text:span></text:p>
      <text:p text:style-name="P49"><text:span text:style-name="T32"><text:tab/>O MySQL apresenta dificuldades estruturais </text:span><text:span text:style-name="T137">com</text:span><text:span text:style-name="T32"> subconsultas complexas, especialmente aquelas que envolvem agregações ou correlações diretas. Para subconsultas independentes (operador </text:span><text:span text:style-name="Source_20_Text"><text:span text:style-name="T32">IN</text:span></text:span><text:span text:style-name="T32">), o MySQL </text:span><text:span text:style-name="T137">cria</text:span><text:span text:style-name="T32"> uma tabela temporária interna em memória para armazenar o resultado do bloco aninhado e, posteriormente, indexá-la dinamicamente. Se o volume de dados extrapola os limites de memória de trabalho, essa tabela é jogada para o disco. Em subconsultas correlacionadas (</text:span><text:span text:style-name="Source_20_Text"><text:span text:style-name="T32">EXISTS</text:span></text:span><text:span text:style-name="T32">), o motor muitas vezes falha em converter a instrução em uma junção linear, sendo forçado a executar o bloco interno como um laço repetitivo para </text:span><text:span text:style-name="T70">cada</text:span><text:span text:style-name="T32"> linha avaliada no bloco externo. Isso faz com que o tempo de processamento permaneça estagnado independentemente de haver índices Hash ou B+Tree ativos, visto que o gargalo reside no número massivo de iterações síncronas de CPU necessárias para consolidar o resultado final.</text:span></text:p>
      <text:p text:style-name="P81"><text:span text:style-name="T101">MySQL <text:s/>839 MB | PostgreSQL 1,07GB </text:span><text:span text:style-name="T138">a</text:span><text:span text:style-name="T101"> 1,32GB</text:span></text:p>
      <text:p text:style-name="P81"><text:span text:style-name="T101"><text:tab/></text:span><text:span text:style-name="T32">O MySQL </text:span><text:span text:style-name="T139">d</text:span><text:span text:style-name="T32">iante de operadores como </text:span><text:span text:style-name="Source_20_Text"><text:span text:style-name="T32">IN</text:span></text:span><text:span text:style-name="T32"> e </text:span><text:span text:style-name="Source_20_Text"><text:span text:style-name="T32">NOT IN</text:span></text:span><text:span text:style-name="T32">, o motor tende a isolar a subconsulta independente e realizar a </text:span><text:span text:style-name="T30">Materialização</text:span><text:span text:style-name="T32">, gravando o resultado do bloco aninhado em uma tabela temporária interna em memória e gerando um índice automático sobre ela. </text:span><text:span text:style-name="T139">S</text:span><text:span text:style-name="T32">eguiu um plano de execução rígido e padronizado por seu otimizador, alocando um bloco de RAM estático para a tabela materializada interna.</text:span></text:p>
      <text:p text:style-name="P81"><text:span text:style-name="T32"><text:tab/>O PostgreSQL exibiu uma oscilação altamente correlacionada à presença de caminhos físicos:<text:tab/></text:span><text:span text:style-name="T70">Cenários Indexados (B+ e Hash 1,07 a 1,19 GB) -</text:span><text:span text:style-name="T32"> </text:span><text:span text:style-name="T139">q</text:span><text:span text:style-name="T32">uando há índices nas tabelas internas, o Postgres consegue resolver os predicados aninhados rapidamente por acessos diretos à árvore, poupando a necessidade de grandes buffers privados. </text:span><text:span text:style-name="T140">Cenário Sem Índice (1.387.934,0 KB) -</text:span><text:span text:style-name="T30"> </text:span><text:span text:style-name="T141">n</text:span><text:span text:style-name="T30">a ausência total de índices, o Otimizador do PostgreSQL aplica transformações algébricas de Desaninhamento, convertendo as subconsultas em Hash Semi-Joins.</text:span><text:span text:style-name="T32"> Para executar o Semi-Join sem o apoio de índices em disco, o motor aloca uma quantidade massiva de RAM privada para erguer tabelas hash temporárias em tempo de execução. Esse comportamento eleva o consumo de RAM, mas permite que o PostgreSQL resolva a subconsulta </text:span><text:span text:style-name="T139">rapidamente</text:span><text:span text:style-name="T32">.</text:span></text:p>
      <text:p text:style-name="P72" loext:marker-style-name="T99"/>
      <text:p text:style-name="P72" loext:marker-style-name="T99"/>
      <text:p text:style-name="P59" loext:marker-style-name="T23"><text:span text:style-name="T53">4. Conclusões</text:span></text:p>
      <text:p text:style-name="P59" loext:marker-style-name="T23"><text:span text:style-name="T53"/></text:p>
      <text:p text:style-name="P59" loext:marker-style-name="T18"><text:soft-page-break/><text:tab/><text:span text:style-name="T43">A realização deste estudo experimental permitiu mapear </text:span><text:span text:style-name="T142">a</text:span><text:span text:style-name="T43"> eficiência algorítmica entre o PostgreSQL e o MySQL.</text:span> <text:span text:style-name="T143">O</text:span>s resultados expõem que cada SGBD responde de forma radicalmente distinta dependendo do perfil da carga de trabalho (transacional / analítico), da volumetria dos dados manipulados e da presença ou ausência de estruturas de indexação auxiliares.</text:p>
      <text:p text:style-name="P49"><text:span text:style-name="T32"><text:tab/>As operações de modificação de dados expuseram o contraste mais profundo entre os modelos de concorrência e controle de isolamento das ferramentas.</text:span><text:span text:style-name="T144"> </text:span><text:span text:style-name="T32">O PostgreSQL demonstrou </text:span><text:span text:style-name="T101">uma agilidade avassaladora e consistente, concluindo inserções, deleções e atualizações pontuais por ID. O MySQL, embora rápido no </text:span><text:span text:style-name="Source_20_Text"><text:span text:style-name="T101">INSERT</text:span></text:span><text:span text:style-name="T101">, sofreu uma severa degradação transacional no </text:span><text:span text:style-name="Source_20_Text"><text:span text:style-name="T101">DELETE</text:span></text:span><text:span text:style-name="T101"> e no </text:span><text:span text:style-name="Source_20_Text"><text:span text:style-name="T101">UPDATE</text:span></text:span><text:span text:style-name="T101">. Esse colapso de tempo no MySQL reflete a penalidade síncrona provocada por varreduras completas (Full Table Scans) consecutivas e pelo esforço de reordenação física de páginas do InnoDB quando chaves e restrições ideais não estão explicitamente ativas em tabelas clonadas. No PostgreSQL, a arquitetura append-only do MVCC posterga o custo de limpeza para processos assíncronos de fundo (Vacuuming), garantindo tempos de resposta instantâneos na camada de aplicação. O modelo multiprocesso do PostgreSQL provou ser altamente enxuto para DMLs puros, uma vez que as atualizações ocorrem diretamente nas páginas Heap e nos buffers globais. O MySQL, sob o modelo Thread-Per-Connection, manteve uma pegada inflada pelo overhead de estruturas de sessão obrigatórias da thread do InnoDB.</text:span></text:p>
      <text:p text:style-name="P49"><text:span text:style-name="T32"><text:tab/>As buscas simples evidenciaram os limites teóricos e a sensibilidade de cada SGBD perante a indexação secundária e o acesso físico ao disco. </text:span><text:span text:style-name="T30">Nas buscas por Chave Primária, o MySQL obteve uma vitória marginal.</text:span><text:span text:style-name="T32"> Esse ganho é justificado pela arquitetura de Tabelas Organizadas por Índice (IOT) do InnoDB: como o dado físico está acoplado ao nó folha da árvore </text:span><text:span text:style-name="T101">Clustered</text:span><text:span text:style-name="T32">, o MySQL localiza a linha em um único passo. </text:span><text:span text:style-name="T109">Contudo, nas Chaves Não-Primárias, o cenário inverteu-se drasticamente: o PostgreSQL manteve resiliência recorrendo ao algoritmo Sequential Scan ou Bitmap Index Scan lineares, enquanto o MySQL </text:span><text:span text:style-name="T145">subiu</text:span><text:span text:style-name="T109"> na ausência de índices e só conseguiu </text:span><text:span text:style-name="T145">melhorar</text:span><text:span text:style-name="T109"> quando amparado por uma Árvore B+ ideal, sofrendo com o alto custo de múltiplos Key Lookups. </text:span><text:span text:style-name="T32">Em acessos pontuais (Chave Primária), manteve-se o comportamento estável d</text:span><text:span text:style-name="T144">e uso de memmoria</text:span><text:span text:style-name="T32">. Porém, ao varrer atributos secundários de larga escala (Chaves Não-Primárias), ambos os motores expandiram o consumo agressivamente para a casa dos gigabytes. O MySQL estabilizou o consumo pelo gerenciador de memória </text:span><text:span text:style-name="Source_20_Text"><text:span text:style-name="T32">TempTable</text:span></text:span><text:span text:style-name="T32">, despejando o excesso de linhas processadas em arquivos de paginação física em disco. O PostgreSQL demonstrou maior elasticidade, alocando buffers de página privados em RAM para garantir que a varredura e o fluxo de blocos lidos fossem mantidos inteiramente na memória volátil de alta velocidade.</text:span></text:p>
      <text:p text:style-name="P51"><text:tab/>As operações <text:span text:style-name="T143">de busca complexas</text:span> consolidaram as maiores assimetrias de engenharia de software documentadas no projeto:</text:p>
      <text:list text:style-name="L2">
        <text:list-item>
          <text:p text:style-name="P82"><text:span text:style-name="T30">Agrupamentos e Agregações (GROUP BY / HAVING): O PostgreSQL </text:span><text:span text:style-name="T146">superou</text:span><text:span text:style-name="T30"> o MySQL.</text:span><text:span text:style-name="T32"> </text:span><text:span text:style-name="T30">O PostgreSQL alcançou este feito utilizando o algoritmo HashAggregate, que cria tabelas hash dinâmicas na memória RAM privada para acumular as métricas lógicas na velocidade da CPU.</text:span><text:span text:style-name="T32"> O MySQL, impedido de expandir sua RAM além do teto do </text:span><text:span text:style-name="Source_20_Text"><text:span text:style-name="T32">TempTable</text:span></text:span><text:span text:style-name="T32">, foi sufocado pelo algoritmo de ordenação implícita com passagem externa em disco, gerando um severo gargalo de escrita de arquivos temporários.</text:span></text:p>
        </text:list-item>
        <text:list-item>
          <text:p text:style-name="P83"><text:span text:style-name="T109">Subconsultas Aninhadas (</text:span><text:span text:style-name="Source_20_Text"><text:span text:style-name="T109">IN</text:span></text:span><text:span text:style-name="T109">, </text:span><text:span text:style-name="Source_20_Text"><text:span text:style-name="T109">EXISTS</text:span></text:span><text:span text:style-name="T109">, </text:span><text:span text:style-name="Source_20_Text"><text:span text:style-name="T109">NOT IN</text:span></text:span><text:span text:style-name="T109">): O PostgreSQL foi até 10 vezes mais veloz que o MySQL. O otimizador do PostgreSQL aplica regras matemáicas avançadas de Desaninhamento (Subquery Unnesting), convertendo as queries aninhadas em estruturas lineares de Hash Semi-Joins ou Anti-Joins. Para isso, o Postgres expande a RAM quando não há índices em disco, enquanto o MySQL fica preso a planos engessados de Materialização e laços repetitivos síncronos de CPU por linha.</text:span></text:p>
        </text:list-item>
        <text:list-item>
          <text:p text:style-name="P83"><text:soft-page-break/><text:span text:style-name="T30">Casamento de Padrões (Cláusula LIKE) e Junções (JOINS): No processamento de strings parciais com caracteres coringa (</text:span><text:span text:style-name="Source_20_Text"><text:span text:style-name="T30">%</text:span></text:span><text:span text:style-name="T30">), ambos os SGBDs comprovaram a invalidação teórica de índices baseados em Hashing e B+Tree à esquerda, resultando em leituras de tabelas completas.</text:span><text:span text:style-name="T32"> </text:span><text:span text:style-name="T101">No entanto, o suporte a Varreduras Sequenciais Paralelas deu vantagem ao PostgreSQL, sacrificando mais memória RAM devido ao overhead de gerenciar múltiplos processos trabalhadores concorrentes.</text:span><text:span text:style-name="T32"> </text:span><text:span text:style-name="T109">Nas Junções, houve equilíbrio competitivo, expondo que o motor moderno do MySQL consegue reagir eficientemente via Hash Join em memória através do buffer de junção quando índices secundários ineficientes em chaves estrangeiras não o induzem ao erro de realizar loops aninhados com saltos aleatórios no disco.</text:span></text:p>
          <text:p text:style-name="P83"><text:span text:style-name="T109"/></text:p>
        </text:list-item>
      </text:list>
      <text:p text:style-name="P84"><text:span text:style-name="T109"><text:tab/></text:span><text:span text:style-name="T32">O PostgreSQL provou possuir um Otimizador Baseado em Custo (CBO) substancialmente mais maduro e inteligente para operações de BI, relatórios e processamento de conjuntos. Sua </text:span><text:span text:style-name="T101">capacidade de alocar memória RAM de forma elástica, dinâmica e paralela (Hash Aggregate, Hash Join, Bitmap Scan, Parallel Workers) compensa a ausência de índices e esmaga o MySQL em tempos de resposta em qualquer cenário analítico complexo, ao custo de uma exigência maior de hardware (memória volátil).</text:span></text:p>
      <text:p text:style-name="P84"><text:span text:style-name="T101"><text:tab/></text:span><text:span text:style-name="T32">O</text:span><text:span text:style-name="T101"> MySQL brilha em cenários de alta seletividade baseados estritamente na Chave Primária. Sua arquitetura de índice Clustered oferece latências de leitura imbatíveis para acessos pontuais por ID. No entanto, o MySQL demonstra ser um sistema extremamente engessado e sensível: a ausência de índices secundários perfeitamente calibrados ou o uso de queries mal modeladas penaliza o motor de forma dramática, expondo restrições rígidas de gerenciamento de buffers que travam o consumo de RAM e transferem a carga de processamento para operações lentas em disco.</text:span></text:p>
      <text:p text:style-name="P84"><text:span text:style-name="T101"><text:tab/></text:span><text:span text:style-name="T32">O estudo comprova de forma definitiva que a simples criação de índices sem planejamento não garante performance. Índices não-ideais ou estruturas auxiliares submetidas a filtros textuais centrais adicionam custos severos de armazenamento e manutenção na RAM sem trazer qualquer benefício de velocidade, reforçando que a eficiência de um banco de dados reside no desenho cirúrgico e no conhecimento íntimo dos algoritmos internos do SGBD escolhido.</text:span></text:p>
      <text:p text:style-name="P10" loext:marker-style-name="T18"><text:span text:style-name="T22"/></text:p>
      <text:p text:style-name="P10" loext:marker-style-name="T18"><text:span text:style-name="T22"/></text:p>
      <text:p text:style-name="P10" loext:marker-style-name="T23"><text:span text:style-name="T11">5. Link para o Repositório com o Código dos Experimentos</text:span></text:p>
      <text:p text:style-name="P10" loext:marker-style-name="T23"><text:span text:style-name="T11"/></text:p>
      <text:p text:style-name="P10" loext:marker-style-name="T18"><text:span text:style-name="T22"><text:tab/>O código-fonte completo contendo os scripts de criação de tabelas, inserção de dados, automação de testes em Python e as planilhas brutas de medições estão disponíveis em:</text:span></text:p>
      <text:p text:style-name="P10" loext:marker-style-name="T18"><text:span text:style-name="T22"/></text:p>
      <text:p text:style-name="P10" loext:marker-style-name="T147"><text:a xlink:type="simple" xlink:href="https://github.com/SQL-2026-Trabalho/ep1" text:style-name="Internet_20_link" text:visited-style-name="Visited_20_Internet_20_Link"><text:span text:style-name="T26">https://github.com/SQL-2026-Trabalho/ep1</text:span></text:a></text:p>
      <text:p text:style-name="P10" loext:marker-style-name="T147"><text:span text:style-name="T26"/></text:p>
      <text:p text:style-name="P85" loext:marker-style-name="T147"><text:span text:style-name="T26"/></text:p>
      <text:p text:style-name="P10" loext:marker-style-name="T23"><text:span text:style-name="T11">6. Link para o Vídeo de Apresentação do Trabalho</text:span></text:p>
      <text:p text:style-name="P10" loext:marker-style-name="T18"><text:span text:style-name="T22">A gravação </text:span><text:span text:style-name="T148">da apresentação</text:span><text:span text:style-name="T22"> dos resultados pode ser acessada pelo link:</text:span></text:p>
      <text:p text:style-name="P10" loext:marker-style-name="T18"><text:span text:style-name="T26"/></text:p>
      <text:p text:style-name="P86" loext:marker-style-name="T147"><text:span text:style-name="T22">****inserir link do youtube</text:span></text:p>
      <text:p text:style-name="P86" loext:marker-style-name="T147"><text:span text:style-name="T22"/></text:p>
      <text:p text:style-name="P86" loext:marker-style-name="T147"><text:span text:style-name="T22"/></text:p>
      <text:p text:style-name="P10" loext:marker-style-name="T147"><text:span text:style-name="T26"/></text:p>
      <text:p text:style-name="P10" loext:marker-style-name="T23"><text:span text:style-name="T11">7. Referências</text:span></text:p>
      <text:p text:style-name="P10" loext:marker-style-name="T23"><text:span text:style-name="T11"/></text:p>
      <text:p text:style-name="P10" loext:marker-style-name="T18"><text:soft-page-break/><text:span text:style-name="T22">[1] SILBERSCHATZ, Abraham; KORTH, Henry F.; SUDARSHAN, S. </text:span><text:span text:style-name="T149">Sistema de Banco de Dados</text:span><text:span text:style-name="T22">. </text:span><text:span text:style-name="T15">7. ed. Rio de Janeiro: GEN LTC, 2020.</text:span></text:p>
      <text:p text:style-name="P9" loext:marker-style-name="T18"/>
      <text:p text:style-name="P9" loext:marker-style-name="T18">[2] POSTGRESQL GLOBAL DEVELOPMENT GROUP. <text:span text:style-name="T21">PostgreSQL 15.0 Documentation</text:span>. Disponível em: https://www.postgresql.org/docs/15/index.html</text:p>
      <text:p text:style-name="P9" loext:marker-style-name="T18"/>
      <text:p text:style-name="P87" loext:marker-style-name="T18">[3] ORACLE CORPORATION. <text:span text:style-name="T21">MySQL 8.0 Reference Manual</text:span>. Disponível em: https://dev.mysql.com/doc/refman/8.0/en/</text:p>
      <text:p text:style-name="P9" loext:marker-style-name="T18"/>
      <text:p text:style-name="P88" loext:marker-style-name="T10">[4] ELMASRI, Ramez; NAVATHE, Shamkant B. Sistemas de Banco de Dados. 7. ed. São Paulo: Pearson Education, 2018.</text:p>
      <text:p text:style-name="P88" loext:marker-style-name="T10"/>
      <text:p text:style-name="P88" loext:marker-style-name="T10">[5] GARCIA-MOLINA, Hector; ULLMAN, Jeffrey D.; WIDOM, Jennifer. Database Systems: The Complete Book. 2. ed. Upper Saddle River: Pearson Prentice Hall, 2008.</text:p>
      <text:p text:style-name="P88" loext:marker-style-name="T10"/>
      <text:p text:style-name="P88" loext:marker-style-name="T10">[6] PETROV, Alex. Database Internals: A Deep Dive into How Distributed Data Systems Store, Treat and Organize Data. Sebastopol: O'Reilly Media, 2019.</text:p>
      <text:p text:style-name="P88" loext:marker-style-name="T10"/>
      <text:p text:style-name="P88" loext:marker-style-name="T10">[7] KLEPPMANN, Martin. Designing Data-Intensive Applications: The Big Ideas Behind Reliable, Scalable, and Maintainable Systems. Sebastopol: O'Reilly Media, 2017.</text:p>
      <text:p text:style-name="P88" loext:marker-style-name="T10"/>
      <text:p text:style-name="P88" loext:marker-style-name="T10">[8] LIGHTSTONE, Sam; TEOREY, Toby; NADEAU, Tom. Physical Database Design: the database professional's guide to exploiting indexes, views, storage, and more. San Francisco: Morgan Kaufmann, 2007.</text:p>
      <text:p text:style-name="P88" loext:marker-style-name="T10"/>
      <text:p text:style-name="P88" loext:marker-style-name="T10">[9] COGMAN, Craig. PostgreSQL Query Optimization: The Ultimate Guide to Building Efficient Queries. Berkeley: Apress, 2021.</text:p>
      <text:p text:style-name="P6"><text:span text:style-name="T150"/></text:p>
      <text:p text:style-name="P6"><text:span text:style-name="T150"/></text:p>
      <text:p text:style-name="P6"><text:span text:style-name="T150"/></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pitch="variable"/>
    <style:font-face style:name="Arial1" svg:font-family="Arial" style:font-family-generic="swiss" style:font-pitch="variable"/>
    <style:font-face style:name="Arial2" svg:font-family="Arial" style:font-adornments="Negrito"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Sans" svg:font-family="Liberation-Sans" style:font-pitch="variable"/>
    <style:font-face style:name="Liberation-Sans-Bold" svg:font-family="Liberation-Sans-Bold"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pt" fo:country="B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Default" style:family="paragraph">
      <style:paragraph-properties fo:text-align="start" style:justify-single-word="false"/>
      <style:text-properties fo:color="#000000" loext:opacity="100%" style:font-name="Arial" fo:font-family="Arial" style:font-pitch="variable" fo:font-size="12pt" style:font-size-asian="12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Lucida Sans1" style:font-family-complex="'Lucida Sans'" style:font-family-generic-complex="system" style:font-pitch-complex="variable" style:font-size-complex="10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ListLabel_20_1" style:display-name="ListLabel 1"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6-05-22T21:28:37.458000000</meta:creation-date>
    <dc:title>Modelo para trabalho de Avaliação de Desempenho de BD - 2024- IME/USP</dc:title>
    <dc:date>2026-05-23T23:03:08.446000000</dc:date>
    <meta:editing-duration>PT4H18M21S</meta:editing-duration>
    <meta:editing-cycles>51</meta:editing-cycles>
    <meta:generator>LibreOffice/24.8.0.3$Windows_X86_64 LibreOffice_project/0bdf1299c94fe897b119f97f3c613e9dca6be583</meta:generator>
    <meta:print-date>2026-05-23T22:18:03.089000000</meta:print-date>
    <meta:printed-by>Arquivos PDF</meta:printed-by>
    <meta:document-statistic meta:table-count="0" meta:image-count="23" meta:object-count="0" meta:page-count="25" meta:paragraph-count="193" meta:word-count="6459" meta:character-count="43163" meta:non-whitespace-character-count="36770"/>
  </office:meta>
</office:document-meta>
</file>