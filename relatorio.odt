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D000002AB3ABED639.png" manifest:media-type="image/png"/>
  <manifest:file-entry manifest:full-path="Pictures/10000001000005C700000181C286CE73.png" manifest:media-type="image/png"/>
  <manifest:file-entry manifest:full-path="Pictures/1000000100000565000002AC4D63A242.png" manifest:media-type="image/png"/>
  <manifest:file-entry manifest:full-path="Pictures/1000000100000565000002AC9BD7ACD2.png" manifest:media-type="image/png"/>
  <manifest:file-entry manifest:full-path="Pictures/1000000100000570000002AC12181349.png" manifest:media-type="image/png"/>
  <manifest:file-entry manifest:full-path="Pictures/1000000100000574000002ABC3F49B34.png" manifest:media-type="image/png"/>
  <manifest:file-entry manifest:full-path="Pictures/10000001000005D70000020EED40C8FF.png" manifest:media-type="image/png"/>
  <manifest:file-entry manifest:full-path="Pictures/10000001000005C8000001EC097D7793.png" manifest:media-type="image/png"/>
  <manifest:file-entry manifest:full-path="Pictures/100000010000057D000002AB95377B01.png" manifest:media-type="image/png"/>
  <manifest:file-entry manifest:full-path="Pictures/1000000100000574000002AB82FC276C.png" manifest:media-type="image/png"/>
  <manifest:file-entry manifest:full-path="Pictures/10000001000005D3000003D93E85F132.png" manifest:media-type="image/png"/>
  <manifest:file-entry manifest:full-path="Pictures/1000000100000572000002AC2169BF9F.png" manifest:media-type="image/png"/>
  <manifest:file-entry manifest:full-path="Pictures/1000000100000572000002AC97F9C29E.png" manifest:media-type="image/png"/>
  <manifest:file-entry manifest:full-path="Pictures/1000000100000570000002ACB493D24C.png" manifest:media-type="image/png"/>
  <manifest:file-entry manifest:full-path="Pictures/100000010000056F000002AC14714438.png" manifest:media-type="image/png"/>
  <manifest:file-entry manifest:full-path="Pictures/100000010000056F000002AC08BE2F6F.png" manifest:media-type="image/png"/>
  <manifest:file-entry manifest:full-path="Pictures/1000000100000573000002ABB980FFFF.png" manifest:media-type="image/png"/>
  <manifest:file-entry manifest:full-path="Pictures/1000000100000573000002AB89CB41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-Sans" svg:font-family="Liberation-Sans" style:font-pitch="variable"/>
    <style:font-face style:name="Liberation-Sans-Bold" svg:font-family="Liberation-Sans-Bold" style:font-pitch="variable"/>
    <style:font-face style:name="Liberation-Sans-Italic" svg:font-family="Liberation-Sans-Italic" style:font-pitch="variable"/>
    <style:font-face style:name="Liberation-Serif-Bold-Italic" svg:font-family="Liberation-Serif-Bold-Italic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RomNo9L-Regu" svg:font-family="NimbusRomNo9L-Regu" style:font-pitch="variable"/>
    <style:font-face style:name="Noto-Sans-Mono" svg:font-family="Noto-Sans-Mono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text-properties style:use-window-font-color="true" loext:opacity="0%" style:font-name="Arial2"/>
    </style:style>
    <style:style style:name="P2" style:family="paragraph" style:parent-style-name="Default">
      <style:paragraph-properties fo:text-align="center" style:justify-single-word="false"/>
      <style:text-properties style:use-window-font-color="true" loext:opacity="0%" style:font-name="Arial2"/>
    </style:style>
    <style:style style:name="P3" style:family="paragraph" style:parent-style-name="Default">
      <style:paragraph-properties fo:text-align="center" style:justify-single-word="false"/>
      <style:text-properties style:use-window-font-color="true" loext:opacity="0%" style:font-name="Arial2" officeooo:paragraph-rsid="001b9a16"/>
    </style:style>
    <style:style style:name="P4" style:family="paragraph" style:parent-style-name="Default">
      <style:paragraph-properties fo:text-align="start" style:justify-single-word="false"/>
      <style:text-properties style:use-window-font-color="true" loext:opacity="0%" style:font-name="Arial2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Arial2" officeooo:paragraph-rsid="001b9a16"/>
    </style:style>
    <style:style style:name="P6" style:family="paragraph" style:parent-style-name="Default">
      <style:paragraph-properties fo:text-align="start" style:justify-single-word="false"/>
      <style:text-properties style:use-window-font-color="true" loext:opacity="0%" style:font-name="Arial2" officeooo:paragraph-rsid="001b9a16"/>
    </style:style>
    <style:style style:name="P7" style:family="paragraph" style:parent-style-name="Default">
      <style:paragraph-properties fo:text-align="start" style:justify-single-word="false"/>
      <style:text-properties style:use-window-font-color="true" loext:opacity="0%" style:font-name="Arial2" fo:font-size="11pt" officeooo:paragraph-rsid="001b9a1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Arial2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Arial2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2" officeooo:paragraph-rsid="001fc37c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fc37c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2" officeooo:paragraph-rsid="002577e0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2" officeooo:paragraph-rsid="00294e15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Arial2" fo:font-size="11pt" officeooo:paragraph-rsid="00294e15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2" officeooo:rsid="00299804" officeooo:paragraph-rsid="00299804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Arial2" fo:font-size="11pt" officeooo:paragraph-rsid="00299804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2" fo:font-size="11pt" officeooo:paragraph-rsid="002ac422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2" officeooo:rsid="002dfedd" officeooo:paragraph-rsid="002dfed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Arial2" fo:font-weight="bold" officeooo:rsid="002c42ef" officeooo:paragraph-rsid="002c42ef" style:font-weight-asian="bold" style:font-weight-complex="bold"/>
    </style:style>
    <style:style style:name="T1" style:family="text">
      <style:text-properties style:text-line-through-style="none" style:text-line-through-type="none" fo:font-size="20pt" style:text-underline-style="none" fo:font-weight="normal" style:font-size-asian="20pt" style:font-weight-asian="normal"/>
    </style:style>
    <style:style style:name="T2" style:family="text">
      <style:text-properties fo:font-size="20pt" fo:font-weight="bold" style:font-size-asian="20pt" style:font-weight-asian="bold"/>
    </style:style>
    <style:style style:name="T3" style:family="text">
      <style:text-properties style:text-line-through-style="none" style:text-line-through-type="none" fo:font-size="20pt" style:text-underline-style="none" fo:font-weight="bold" style:font-size-asian="20pt" style:font-weight-asian="bold"/>
    </style:style>
    <style:style style:name="T4" style:family="text">
      <style:text-properties style:text-line-through-style="none" style:text-line-through-type="none" fo:font-size="20pt" style:text-underline-style="none" fo:font-weight="bold" officeooo:rsid="001b9a16" style:font-size-asian="20pt" style:font-weight-asian="bold"/>
    </style:style>
    <style:style style:name="T5" style:family="text">
      <style:text-properties style:text-line-through-style="none" style:text-line-through-type="none" fo:font-size="28pt" style:text-underline-style="none" fo:font-weight="normal" style:font-size-asian="28pt" style:font-weight-asian="normal"/>
    </style:style>
    <style:style style:name="T6" style:family="text">
      <style:text-properties style:text-line-through-style="none" style:text-line-through-type="none" fo:font-size="28pt" style:text-underline-style="none" fo:font-weight="bold" style:font-size-asian="28pt" style:font-weight-asian="bold"/>
    </style:style>
    <style:style style:name="T7" style:family="text">
      <style:text-properties style:text-line-through-style="none" style:text-line-through-type="none" fo:font-size="15pt" style:text-underline-style="none" fo:font-weight="normal" style:font-size-asian="15pt" style:font-weight-asian="normal"/>
    </style:style>
    <style:style style:name="T8" style:family="text">
      <style:text-properties style:text-line-through-style="none" style:text-line-through-type="none" fo:font-size="15pt" style:text-underline-style="none" fo:font-weight="bold" officeooo:rsid="001b9a16" style:font-size-asian="15pt" style:font-weight-asian="bold"/>
    </style:style>
    <style:style style:name="T9" style:family="text">
      <style:text-properties style:text-line-through-style="none" style:text-line-through-type="none" fo:font-size="15pt" style:text-underline-style="none" fo:font-weight="bold" style:font-size-asian="15pt" style:font-weight-asian="bold"/>
    </style:style>
    <style:style style:name="T10" style:family="text">
      <style:text-properties fo:font-size="14pt" fo:font-weight="normal" style:font-size-asian="14pt" style:font-weight-asian="normal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style:text-line-through-style="none" style:text-line-through-type="none" fo:font-size="11.5pt" style:text-underline-style="none" fo:font-weight="normal" style:font-size-asian="11.5pt" style:font-weight-asian="normal" style:font-weight-complex="normal"/>
    </style:style>
    <style:style style:name="T13" style:family="text">
      <style:text-properties style:text-line-through-style="none" style:text-line-through-type="none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style:text-line-through-style="none" style:text-line-through-type="none" fo:font-size="11pt" style:text-underline-style="none" fo:font-weight="normal" officeooo:rsid="001cd7e1" style:font-size-asian="11pt" style:font-weight-asian="normal" style:font-size-complex="11pt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1cd7e1" style:font-size-asian="11pt" style:font-size-complex="11pt"/>
    </style:style>
    <style:style style:name="T17" style:family="text">
      <style:text-properties fo:font-size="11pt" officeooo:rsid="001d02f2" style:font-size-asian="11pt" style:font-size-complex="11pt"/>
    </style:style>
    <style:style style:name="T18" style:family="text">
      <style:text-properties fo:color="#333333" loext:opacity="100%" style:font-name="Liberation-Sans" fo:font-size="11pt" style:font-size-asian="11pt"/>
    </style:style>
    <style:style style:name="T19" style:family="text">
      <style:text-properties officeooo:rsid="001d02f2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/>
    </style:style>
    <style:style style:name="T22" style:family="text">
      <style:text-properties fo:font-size="11pt" style:font-size-asian="11pt"/>
    </style:style>
    <style:style style:name="T23" style:family="text">
      <style:text-properties fo:color="#1a365d" loext:opacity="100%" style:font-name="Liberation-Sans-Bold" fo:font-size="14pt" fo:font-weight="bold" style:font-size-asian="14pt" style:font-weight-asian="bold"/>
    </style:style>
    <style:style style:name="T24" style:family="text">
      <style:text-properties fo:color="#2b6cb1" loext:opacity="100%" style:font-name="Liberation-Sans-Bold" fo:font-size="12pt" fo:font-weight="bold" style:font-size-asian="12pt" style:font-weight-asian="bold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1pt" fo:font-weight="bold" style:font-size-asian="11pt" style:font-weight-asian="bold"/>
    </style:style>
    <style:style style:name="T27" style:family="text">
      <style:text-properties style:use-window-font-color="true" loext:opacity="0%" style:font-name="Arial2" fo:font-size="11pt" fo:font-weight="bold" style:font-size-asian="11pt" style:font-weight-asian="bold"/>
    </style:style>
    <style:style style:name="T28" style:family="text">
      <style:text-properties style:use-window-font-color="true" loext:opacity="0%" style:font-name="Arial2" fo:font-size="11pt" style:font-size-asian="11pt"/>
    </style:style>
    <style:style style:name="T29" style:family="text">
      <style:text-properties style:use-window-font-color="true" loext:opacity="0%" style:font-name="Arial2" fo:font-size="11pt" officeooo:rsid="001fc37c" style:font-size-asian="11pt"/>
    </style:style>
    <style:style style:name="T30" style:family="text">
      <style:text-properties style:use-window-font-color="true" loext:opacity="0%" style:font-name="Arial2" fo:font-size="11pt" fo:font-style="normal" style:font-size-asian="11pt" style:font-style-asian="normal" style:font-style-complex="normal"/>
    </style:style>
    <style:style style:name="T31" style:family="text">
      <style:text-properties fo:font-size="11pt" officeooo:rsid="002577e0" style:font-size-asian="11pt"/>
    </style:style>
    <style:style style:name="T32" style:family="text">
      <style:text-properties fo:font-size="11pt" fo:font-weight="normal" style:font-size-asian="11pt" style:font-weight-asian="normal" style:font-weight-complex="normal"/>
    </style:style>
    <style:style style:name="T33" style:family="text">
      <style:text-properties fo:font-size="9pt" style:font-size-asian="9pt"/>
    </style:style>
    <style:style style:name="T34" style:family="text">
      <style:text-properties fo:color="#ffffff" loext:opacity="100%" style:font-name="Liberation-Sans-Bold" fo:font-size="9.5pt" fo:font-weight="bold" style:font-size-asian="9.5pt" style:font-weight-asian="bold"/>
    </style:style>
    <style:style style:name="T35" style:family="text">
      <style:text-properties fo:font-size="9pt" fo:font-style="italic" fo:font-weight="bold" style:font-size-asian="9pt" style:font-style-asian="italic" style:font-weight-asian="bold"/>
    </style:style>
    <style:style style:name="T36" style:family="text">
      <style:text-properties fo:color="#333333" loext:opacity="100%" style:font-name="Liberation-Sans" fo:font-size="10.5pt" style:font-size-asian="10.5pt"/>
    </style:style>
    <style:style style:name="T37" style:family="text">
      <style:text-properties fo:font-size="10.5pt" fo:font-weight="bold" style:font-size-asian="10.5pt" style:font-weight-asian="bold"/>
    </style:style>
    <style:style style:name="T38" style:family="text">
      <style:text-properties fo:font-weight="bold" style:font-weight-asian="bold"/>
    </style:style>
    <style:style style:name="T39" style:family="text">
      <style:text-properties fo:font-style="normal" officeooo:rsid="00294e15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style:font-style-asian="normal" style:font-weight-asian="bold" style:font-style-complex="normal"/>
    </style:style>
    <style:style style:name="T42" style:family="text">
      <style:text-properties fo:font-size="12pt" fo:font-weight="bold" style:font-size-asian="12pt" style:font-weight-asian="bold" style:font-size-complex="12pt"/>
    </style:style>
    <style:style style:name="T43" style:family="text">
      <style:text-properties fo:color="#555555" loext:opacity="100%" style:font-name="Liberation-Sans" fo:font-size="9pt" style:font-size-asian="9pt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tyle="italic" fo:font-weight="bold" style:font-style-asian="italic" style:font-weight-asian="bold"/>
    </style:style>
    <style:style style:name="T46" style:family="text">
      <style:text-properties fo:font-size="10.5pt" style:font-size-asian="10.5pt"/>
    </style:style>
    <style:style style:name="T47" style:family="text">
      <style:text-properties fo:font-size="11pt" fo:font-weight="normal" style:font-size-asian="11pt" style:font-weight-asian="normal" style:font-size-complex="11pt" style:font-weight-complex="normal"/>
    </style:style>
    <style:style style:name="T48" style:family="text">
      <style:text-properties fo:font-size="11pt" fo:font-weight="bold" style:font-size-asian="11pt" style:font-weight-asian="bold" style:font-size-complex="11pt"/>
    </style:style>
    <style:style style:name="T49" style:family="text">
      <style:text-properties fo:font-size="11pt" officeooo:rsid="002adfe5" style:font-size-asian="11pt" style:font-size-complex="11pt"/>
    </style:style>
    <style:style style:name="T50" style:family="text">
      <style:text-properties fo:color="#2b6cb1" loext:opacity="100%" style:font-name="Liberation-Sans-Bold" fo:font-size="11pt" fo:font-weight="bold" style:font-size-asian="11pt" style:font-weight-asian="bold"/>
    </style:style>
    <style:style style:name="T51" style:family="text">
      <style:text-properties fo:font-size="11pt" officeooo:rsid="002c42ef" style:font-size-asian="11pt"/>
    </style:style>
    <style:style style:name="T52" style:family="text">
      <style:text-properties fo:font-size="11pt" fo:font-style="italic" style:font-size-asian="11pt" style:font-style-asian="italic"/>
    </style:style>
    <style:style style:name="T53" style:family="text">
      <style:text-properties fo:font-size="12pt" style:font-size-asian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/><text:span text:style-name="T2">MAC0426-MAC5760 </text:span><text:span text:style-name="T1"/></text:p>
      <text:p text:style-name="P2" loext:marker-style-name="T1"><text:span text:style-name="T3">IME/USP – 202</text:span><text:span text:style-name="T4">6</text:span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5"><text:span text:style-name="T6">Análise de Desempenho de </text:span><text:span text:style-name="T5"/></text:p>
      <text:p text:style-name="P2" loext:marker-style-name="T5"><text:span text:style-name="T6">Bancos de Dados </text:span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5"><text:span text:style-name="T5"/></text:p>
      <text:p text:style-name="P2" loext:marker-style-name="T1"><text:span text:style-name="T3">Grupo: </text:span><text:span text:style-name="T1"/></text:p>
      <text:p text:style-name="P2" loext:marker-style-name="T7"><text:span text:style-name="T8">Enzo Furegatti Spinella</text:span><text:span text:style-name="T9"> </text:span><text:span text:style-name="T8">14568198</text:span><text:span text:style-name="T9"> </text:span></text:p>
      <text:p text:style-name="P2" loext:marker-style-name="T7"><text:span text:style-name="T8">Ísis Ardisson Logullo</text:span><text:span text:style-name="T9"> </text:span><text:span text:style-name="T8">7577410</text:span><text:span text:style-name="T9"> </text:span></text:p>
      <text:p text:style-name="P3"><text:span text:style-name="T8">Luiz Fernando de Freitas Fernandes</text:span><text:span text:style-name="T9"> </text:span><text:span text:style-name="T8">13671678</text:span></text:p>
      <text:p text:style-name="P3"><text:span text:style-name="T8">Matheus Rodrigues da Silva Espalaor 14598615</text:span></text:p>
      <text:p text:style-name="P3"><text:soft-page-break/><text:span text:style-name="T8">­</text:span><text:span text:style-name="T9"> </text:span></text:p>
      <text:p text:style-name="P4" loext:marker-style-name="T10"><text:span text:style-name="T11">1. Introdução </text:span><text:span text:style-name="T10"/></text:p>
      <text:p text:style-name="P5"><text:span text:style-name="T9"/></text:p>
      <text:p text:style-name="P6"><text:span text:style-name="T12"><text:tab/></text:span><text:span text:style-name="T13">Este trabalho consiste </text:span><text:span text:style-name="T14">num estudo para medir e comparar o desempenho dos SGBDs PostgreSQL </text:span><text:span text:style-name="T15">e MySQL na execu</text:span><text:span text:style-name="T16">çã</text:span><text:span text:style-name="T15">o de diversos tipos de consultas e opera</text:span><text:span text:style-name="T16">çõ</text:span><text:span text:style-name="T15">es de modifica</text:span><text:span text:style-name="T16">çã</text:span><text:span text:style-name="T15">o dos dados em SQL sobre um banco de dados relacional, com e sem o apoio de </text:span><text:span text:style-name="T16">í</text:span><text:span text:style-name="T15">ndices. </text:span><text:span text:style-name="T15">O cerne do experimento </text:span><text:span text:style-name="T17">está</text:span><text:span text:style-name="T15"> em </text:span><text:span text:style-name="T17">a</text:span><text:span text:style-name="T15">nalisar como cada motor se comporta sob diferentes cargas de trabalho em SQL, </text:span><text:span text:style-name="T17">abrangendo</text:span><text:span text:style-name="T15"> tanto consultas complexas de leitura quanto operações </text:span><text:span text:style-name="T17">DML</text:span><text:span text:style-name="T15">, considerando cenários com e sem o apoio de estruturas de indexação (Árvores B+ e tabelas Hash).</text:span></text:p>
      <text:p text:style-name="P7"/>
      <text:p text:style-name="P8" loext:marker-style-name="T18"><text:tab/>Fo<text:span text:style-name="T19">i usado um</text:span> banco de dados do <text:span text:style-name="T20">Stack Overflow</text:span><text:span text:style-name="T21"> </text:span>referente ao ano de 2010. Este dataset <text:span text:style-name="T19">possui</text:span> tabelas massivas contendo milhões de registros interconectados (como usuários, postagens, comentários e votos). A avaliação <text:span text:style-name="T19">reside</text:span> principalmente na métrica de tempo total de execução das operações, registrando e isolando os efeitos colaterais de cache, e mapeando de maneira secundária a utilização de memória RAM durante o processamento.</text:p>
      <text:p text:style-name="P9" loext:marker-style-name="T18"><text:span text:style-name="T22"/></text:p>
      <text:p text:style-name="P9" loext:marker-style-name="T23"><text:span text:style-name="T11">2. Descrição dos Experimentos Realizados</text:span></text:p>
      <text:p text:style-name="P9" loext:marker-style-name="T23"><text:span text:style-name="T11"/></text:p>
      <text:p text:style-name="P9" loext:marker-style-name="T18"><text:span text:style-name="T22"><text:tab/>Esta seção apresenta os detalhes técnicos dos experimentos concebidos e implementados no estudo, detalhando as operações selecionadas, a modelagem dos cenários sob teste e a infraestrutura computacional utilizada.</text:span></text:p>
      <text:p text:style-name="P9" loext:marker-style-name="T18"><text:span text:style-name="T22"/></text:p>
      <text:p text:style-name="P9" loext:marker-style-name="T24"><text:span text:style-name="T25">2.1. Operações Avaliadas sobre o BD</text:span></text:p>
      <text:p text:style-name="P9" loext:marker-style-name="T24"><text:span text:style-name="T25"/></text:p>
      <text:p text:style-name="P9" loext:marker-style-name="T18"><text:span text:style-name="T22"><text:tab/>Definiu-se para o experimento um conjunto padronizado de operações em SQL que abrange uma ampla gama de modificações e consultas de dados. As categorias de operações executadas são descritas a seguir:</text:span></text:p>
      <text:p text:style-name="P9" loext:marker-style-name="T18"><text:span text:style-name="T22"/></text:p>
      <text:p text:style-name="P10" loext:marker-style-name="T18"><text:span text:style-name="T26">Operações de Modificação de Dados: </text:span></text:p>
      <text:p text:style-name="P10" loext:marker-style-name="T18"><text:span text:style-name="T22"/></text:p>
      <text:p text:style-name="P10" loext:marker-style-name="T18"><text:span text:style-name="T22"><text:tab/>Compreendem a inserção sequencial de novos registros (INSERT), a alteração em massa de registros existentes aplicando predicados específicos (UPDATE), e a remoção controlada de tuplas em tabelas principais (DELETE).</text:span></text:p>
      <text:p text:style-name="P9" loext:marker-style-name="T18"><text:span text:style-name="T26"/></text:p>
      <text:list text:style-name="L1">
        <text:list-item>
          <text:p text:style-name="P11" loext:marker-style-name="T18"><text:span text:style-name="T27">Busca por Chave Primária: </text:span><text:span text:style-name="T28">Consultas pontuais que efetuam a seleção de uma única linha </text:span><text:span text:style-name="T29">pelo ID</text:span><text:span text:style-name="T28"> indexado por padrão na tabela de postagens (Posts).</text:span></text:p>
        </text:list-item>
        <text:list-item>
          <text:p text:style-name="P11" loext:marker-style-name="T18"><text:span text:style-name="T27">Busca por Atributo Não-Chave Primária: </text:span><text:span text:style-name="T28">Consultas que realizam a filtragem a partir de colunas secundárias, incorporando condições de seleção compostas por operadores lógicos (AND/OR).</text:span></text:p>
        </text:list-item>
        <text:list-item>
          <text:p text:style-name="P11" loext:marker-style-name="T18"><text:span text:style-name="T27">Busca por Padrões de Strings: </text:span><text:span text:style-name="T28">Consultas baseadas em correspondência parcial utilizando a cláusula de texto estruturado LIKE acompanhada de c</text:span><text:span text:style-name="T29">u</text:span><text:span text:style-name="T28">ringas posicionais (%pattern%).</text:span></text:p>
        </text:list-item>
        <text:list-item>
          <text:p text:style-name="P12" loext:marker-style-name="T18"><text:span text:style-name="T27">Busca envolvendo Relacionamentos (Junções): </text:span><text:span text:style-name="T28">Operações complexas que necessitam acoplar dados de múltiplas tabelas correlacionadas através de chaves estrangeiras.</text:span></text:p>
        </text:list-item>
        <text:list-item>
          <text:p text:style-name="P11" loext:marker-style-name="T18"><text:span text:style-name="T27">Busca envolvendo Subconsultas: </text:span><text:span text:style-name="T28">Consultas que aninham blocos de seleção internos para realizar filtragens dinâmicas dependentes.</text:span></text:p>
        </text:list-item>
        <text:list-item>
          <text:p text:style-name="P11" loext:marker-style-name="T18"><text:span text:style-name="T27">Busca envolvendo Agrupamentos e Agregações: </text:span><text:span text:style-name="T28">Consultas </text:span><text:span text:style-name="T29">de</text:span><text:span text:style-name="T28"> grandes volumes de dados empregando funções agregadas clássicas tais como COUNT, SUM, AVG, MIN e MAX combinadas com agrupamentos explícitos por meio da cláusula GROUP BY.</text:span></text:p>
        </text:list-item>
      </text:list>
      <text:p text:style-name="P13" loext:marker-style-name="T18"><text:span text:style-name="T28"/></text:p>
      <text:p text:style-name="P13" loext:marker-style-name="T18"><text:span text:style-name="T28"/></text:p>
      <text:p text:style-name="P13" loext:marker-style-name="T18"><text:span text:style-name="T28"/></text:p>
      <text:p text:style-name="P9" loext:marker-style-name="T24"><text:span text:style-name="T25"/></text:p>
      <text:p text:style-name="P9" loext:marker-style-name="T24"><text:span text:style-name="T25"/></text:p>
      <text:p text:style-name="P9" loext:marker-style-name="T24"><text:span text:style-name="T25"/></text:p>
      <text:p text:style-name="P9" loext:marker-style-name="T24"><text:soft-page-break/><text:span text:style-name="T25">2.2. Cenários Experimentais</text:span></text:p>
      <text:p text:style-name="P9" loext:marker-style-name="T24"><text:span text:style-name="T25"/></text:p>
      <text:p text:style-name="P9" loext:marker-style-name="T18"><text:span text:style-name="T22"><text:tab/>A fim de medir o impacto das estruturas de armazenamento e os caminhos de otimização adotados por cada SGBD, os testes foram subdivididos e isolados nos seguintes cenários:</text:span></text:p>
      <text:p text:style-name="P9" loext:marker-style-name="T18"><text:span text:style-name="T22"/></text:p>
      <text:list text:style-name="L2">
        <text:list-item>
          <text:p text:style-name="P14" loext:marker-style-name="T18"><text:span text:style-name="T27">Cenário Sem Índices: </text:span><text:span text:style-name="T28">Estado original do banco de dados pós-carga onde apenas as chaves primárias e restrições básicas de integridade possuem indexação nativa. Força a execução de buscas sequenciais completas (</text:span><text:span text:style-name="T30">Full Table Scans</text:span><text:span text:style-name="T28">) para atributos não-chave.</text:span></text:p>
        </text:list-item>
        <text:list-item>
          <text:p text:style-name="P14" loext:marker-style-name="T18"><text:span text:style-name="T27">Cenário com Índice Árvore B+: </text:span><text:span text:style-name="T28">Aplicação de estruturas do tipo Árvore B+ (padrão BTREE) nas colunas de busca não-chave mais frequentes, permitindo o particionamento de faixas de valores e acesso logarítmico.</text:span></text:p>
        </text:list-item>
        <text:list-item>
          <text:p text:style-name="P14" loext:marker-style-name="T18"><text:span text:style-name="T27">Cenário com Índice Hash: </text:span><text:span text:style-name="T28">Aplicação de indexação baseada em tabelas Hash nos atributos de busca exata, otimizando o acesso direto a registros de forma pontual.</text:span></text:p>
        </text:list-item>
        <text:list-item>
          <text:p text:style-name="P14" loext:marker-style-name="T18"><text:span text:style-name="T27">Cenário de Índice Não-Ideal: </text:span><text:span text:style-name="T28">Configuração deliberada de índices em colunas de baixa seletividade ou que não se alinham diretamente com os predicados da cláusula WHERE, servindo para demonstrar o custo e degradação provocados por erros de design.</text:span></text:p>
          <text:p text:style-name="P14" loext:marker-style-name="T18"><text:span text:style-name="T28"/></text:p>
        </text:list-item>
      </text:list>
      <text:p text:style-name="P9" loext:marker-style-name="T24"><text:span text:style-name="T25">2.3. Ambiente Computacional Usado</text:span></text:p>
      <text:p text:style-name="P9" loext:marker-style-name="T24"><text:span text:style-name="T25"/></text:p>
      <text:p text:style-name="P9" loext:marker-style-name="T18"><text:span text:style-name="T22"><text:tab/>Os experimentos foram realizados na mesma máquina para garantir que fatores físicos</text:span></text:p>
      <text:p text:style-name="P15" loext:marker-style-name="T18"><text:span text:style-name="T22">não distorcessem a comparação entre os sistemas. A infraestrutura consistiu em um processador 12th Gen Intel Core i7-12700H (2.30 GHz); 32GB </text:span><text:span text:style-name="T31">RAM; GPU 8GB - </text:span><text:span text:style-name="T22">NVIDIA GeForce RTX 3070 Ti; sob o sistema operacional Linux Ubuntu 22.04 LTS.</text:span></text:p>
      <text:p text:style-name="P15" loext:marker-style-name="T18"><text:span text:style-name="T22"/></text:p>
      <text:p text:style-name="P9" loext:marker-style-name="T18"><text:span text:style-name="T22"><text:tab/>Utilizou-se o</text:span><text:span text:style-name="T32"> PostgreSQL versão 15 e o MySQL versão 8.0. Para </text:span><text:span text:style-name="T22">a conexão com esses SGBDs e submissão automatizada das operações, foi desenvolvido um conjunto de scripts em Python utilizando psycopg2 para o PostgreSQL e mysql.connector para o MySQL. </text:span><text:span text:style-name="T31">F</text:span><text:span text:style-name="T22">o</text:span><text:span text:style-name="T31">ram</text:span><text:span text:style-name="T22"> disparada</text:span><text:span text:style-name="T31">s</text:span><text:span text:style-name="T22"> e cronometrada</text:span><text:span text:style-name="T31">s</text:span><text:span text:style-name="T32"> 20 vezes</text:span><text:span text:style-name="T22"> em cada cenário, limpando os buffers de cache concorrentes de modo a obter significância estatística estável.</text:span></text:p>
      <text:p text:style-name="P9" loext:marker-style-name="T18"><text:span text:style-name="T33"/></text:p>
      <text:p text:style-name="P9" loext:marker-style-name="T18"><text:span text:style-name="T33"/></text:p>
      <text:p text:style-name="P9" loext:marker-style-name="T23"><text:span text:style-name="T11">3. Resultados dos Experimentos</text:span></text:p>
      <text:p text:style-name="P9" loext:marker-style-name="T23"><text:span text:style-name="T11"/></text:p>
      <text:p text:style-name="P9" loext:marker-style-name="T18"><text:span text:style-name="T22"><text:tab/>Os dados brutos coletados ao longo das centenas de execuções automatizadas foram processados e sintetizados. A seguir, apresentam-se as tabelas de desempenho divididas por categorias de uso, exibindo os tempos médios calculados em segundos e seus respectivos desvios padrões, que quantificam a variabilidade do ambiente e do comportamento interno dos SGBDs.</text:span></text:p>
      <text:p text:style-name="P9" loext:marker-style-name="T18"><text:span text:style-name="T22"/></text:p>
      <text:p text:style-name="P9" loext:marker-style-name="T24"><text:span text:style-name="T25">3.1. Desempenho de Operações de Modificação de Dados (Escrita)</text:span></text:p>
      <text:p text:style-name="P9" loext:marker-style-name="T24"><text:span text:style-name="T25"/></text:p>
      <text:p text:style-name="P9" loext:marker-style-name="T18"><text:span text:style-name="T22"><text:tab/>As operações de escrita expõem a forma como o mecanismo de armazenamento de cada SGBD gerencia transações, travas e gravação em disco.</text:span></text:p>
      <text:p text:style-name="P9" loext:marker-style-name="T34"><text:span text:style-name="T35"/></text:p>
      <text:p text:style-name="P9" loext:marker-style-name="T34"><draw:frame draw:style-name="fr1" draw:name="Figura1" text:anchor-type="char" svg:width="17cm" svg:height="4.424cm" draw:z-index="0"><draw:image xlink:href="Pictures/10000001000005C700000181C286CE73.png" xlink:type="simple" xlink:show="embed" xlink:actuate="onLoad" draw:mime-type="image/png"/></draw:frame><text:span text:style-name="T35"/></text:p>
      <text:p text:style-name="P9" loext:marker-style-name="T36"><text:span text:style-name="T37"/></text:p>
      <text:p text:style-name="P9" loext:marker-style-name="T36"><text:span text:style-name="T37"/></text:p>
      <text:p text:style-name="P16" loext:marker-style-name="T36"><draw:frame draw:style-name="fr2" draw:name="Figura3" text:anchor-type="char" svg:width="17cm" svg:height="8.419cm" draw:z-index="2"><draw:image xlink:href="Pictures/1000000100000565000002AC4D63A242.png" xlink:type="simple" xlink:show="embed" xlink:actuate="onLoad" draw:mime-type="image/png"/></draw:frame><text:soft-page-break/><text:span text:style-name="T37"/></text:p>
      <text:p text:style-name="P16" loext:marker-style-name="T36"><draw:frame draw:style-name="fr2" draw:name="Figura4" text:anchor-type="char" svg:width="17cm" svg:height="8.419cm" draw:z-index="3"><draw:image xlink:href="Pictures/1000000100000565000002AC9BD7ACD2.png" xlink:type="simple" xlink:show="embed" xlink:actuate="onLoad" draw:mime-type="image/png"/></draw:frame><text:span text:style-name="T37"/></text:p>
      <text:p text:style-name="P17" loext:marker-style-name="T36"><text:span text:style-name="T38"/></text:p>
      <text:p text:style-name="P17" loext:marker-style-name="T36"><text:span text:style-name="T38">Análise: </text:span></text:p>
      <text:p text:style-name="P17" loext:marker-style-name="T36"><text:span text:style-name="T38"/></text:p>
      <text:p text:style-name="P17" loext:marker-style-name="T36"><text:span text:style-name="T38"><text:tab/></text:span>O<text:span text:style-name="T20"> PostgreSQL demonstr</text:span><text:span text:style-name="T39">ou</text:span><text:span text:style-name="T20"> uma superioridade avassaladora e consistente nas operações de UPDATE e DELETE em lote. Enquanto o PostgreSQL concluiu as atualizações em torno de </text:span><text:span text:style-name="T40">0.025</text:span><text:span text:style-name="T41"> </text:span><text:span text:style-name="T20">segundos, o MySQL necessitou de </text:span><text:span text:style-name="T40">28.93 </text:span><text:span text:style-name="T20">segundos em média. Esse comportamento decorre da implementação do MVCC (Multi-Version Concurrency Control) do PostgreSQL, que transforma atualizações e exclusões em inserções lógicas eficientes com posterior limpeza. O MySQL (InnoDB), por sua vez, enfrenta sobrecarga severa de travamento de páginas e gerenciamento rigoroso do buffer par</text:span>a grandes volumes de dados não otimizados.</text:p>
      <text:p text:style-name="P8" loext:marker-style-name="T36"/>
      <text:p text:style-name="P8" loext:marker-style-name="T36"/>
      <text:p text:style-name="P8" loext:marker-style-name="T24"><text:span text:style-name="T38">3.2. </text:span><text:span text:style-name="T42">Desempenho de Consultas Simples e Filtragens</text:span></text:p>
      <text:p text:style-name="P8" loext:marker-style-name="T24"><text:span text:style-name="T38"/></text:p>
      <text:p text:style-name="P8" loext:marker-style-name="T18"><text:tab/>As tabelas a seguir expõem a comparação clássica de busca pontual e a influência direta da ativação de índices secundários Árvore B+ e Hash frente ao cenário sem indexação.</text:p>
      <text:p text:style-name="P9" loext:marker-style-name="T18"><text:span text:style-name="T22"/></text:p>
      <text:p text:style-name="P9" loext:marker-style-name="T18"><draw:frame draw:style-name="fr3" draw:name="Figura2" text:anchor-type="char" svg:x="0cm" svg:y="0.113cm" svg:width="17cm" svg:height="5.981cm" draw:z-index="1"><draw:image xlink:href="Pictures/10000001000005D70000020EED40C8FF.png" xlink:type="simple" xlink:show="embed" xlink:actuate="onLoad" draw:mime-type="image/png"/></draw:frame><draw:frame draw:style-name="fr2" draw:name="Figura5" text:anchor-type="char" svg:width="17cm" svg:height="8.264cm" draw:z-index="4"><draw:image xlink:href="Pictures/100000010000057D000002AB95377B01.png" xlink:type="simple" xlink:show="embed" xlink:actuate="onLoad" draw:mime-type="image/png"/></draw:frame><text:soft-page-break/><text:span text:style-name="T22"/></text:p>
      <text:p text:style-name="P9" loext:marker-style-name="T34"><draw:frame draw:style-name="fr2" draw:name="Figura6" text:anchor-type="char" svg:width="17cm" svg:height="8.264cm" draw:z-index="5"><draw:image xlink:href="Pictures/100000010000057D000002AB3ABED639.png" xlink:type="simple" xlink:show="embed" xlink:actuate="onLoad" draw:mime-type="image/png"/></draw:frame><text:span text:style-name="T35"/></text:p>
      <text:p text:style-name="P9" loext:marker-style-name="T43"><text:span text:style-name="T33"/></text:p>
      <text:p text:style-name="P9" loext:marker-style-name="T43"><text:span text:style-name="T33"/></text:p>
      <text:p text:style-name="P9" loext:marker-style-name="T43"><draw:frame draw:style-name="fr2" draw:name="Figura7" text:anchor-type="char" svg:width="17cm" svg:height="5.65cm" draw:z-index="6"><draw:image xlink:href="Pictures/10000001000005C8000001EC097D7793.png" xlink:type="simple" xlink:show="embed" xlink:actuate="onLoad" draw:mime-type="image/png"/></draw:frame><text:span text:style-name="T33"/></text:p>
      <text:p text:style-name="P9" loext:marker-style-name="T43"><text:span text:style-name="T33"/></text:p>
      <text:p text:style-name="P9" loext:marker-style-name="T43"><text:span text:style-name="T33"/></text:p>
      <text:p text:style-name="P9" loext:marker-style-name="T43"><text:span text:style-name="T33"/></text:p>
      <text:p text:style-name="P18" loext:marker-style-name="T34"><text:soft-page-break/><text:span text:style-name="T35">­</text:span><draw:frame draw:style-name="fr1" draw:name="Figura8" text:anchor-type="char" svg:width="17cm" svg:height="8.317cm" draw:z-index="7"><draw:image xlink:href="Pictures/1000000100000574000002ABC3F49B34.png" xlink:type="simple" xlink:show="embed" xlink:actuate="onLoad" draw:mime-type="image/png"/></draw:frame></text:p>
      <text:p text:style-name="P9" loext:marker-style-name="T36"><draw:frame draw:style-name="fr2" draw:name="Figura9" text:anchor-type="char" svg:width="17cm" svg:height="8.317cm" draw:z-index="8"><draw:image xlink:href="Pictures/1000000100000574000002AB82FC276C.png" xlink:type="simple" xlink:show="embed" xlink:actuate="onLoad" draw:mime-type="image/png"/></draw:frame><text:span text:style-name="T37"/></text:p>
      <text:p text:style-name="P9" loext:marker-style-name="T36"><text:span text:style-name="T37"/></text:p>
      <text:p text:style-name="P19" loext:marker-style-name="T36"><text:span text:style-name="T38">Análise: </text:span></text:p>
      <text:p text:style-name="P19" loext:marker-style-name="T36"><text:span text:style-name="T38"/></text:p>
      <text:p text:style-name="P19" loext:marker-style-name="T36"><text:span text:style-name="T38"><text:tab/></text:span>Nas buscas por chave primária, ambos os SGBDs operam na escala de milissegundos devido à criação automática do índice clusterizado (MySQL) ou índice de restrição (PostgreSQL). Já nas colunas não-chave, observamos um dado curioso: para o PostgreSQL, a inclusão de índices secundários nas colunas testadas manteve o tempo linear estável em torno de<text:span text:style-name="T44"> </text:span><text:span text:style-name="T40">3.2</text:span><text:span text:style-name="T45"> </text:span>segundos, indicando que o otimizador preferiu ignorar o índice ou realizar um <text:span text:style-name="T20">Bitmap Index Scan</text:span><text:span text:style-name="T21"> </text:span>devido ao tamanho da seletividade do recorte. No MySQL, o índice Árvore B+ reduziu o tempo drasticamente de <text:span text:style-name="T40">10.96</text:span><text:span text:style-name="T45"> </text:span>segundos (sem índice) para <text:span text:style-name="T40">6.13 </text:span>segundos, provando alta sensibilidade a falta de estruturas auxiliares.</text:p>
      <text:p text:style-name="P9" loext:marker-style-name="T36"><text:span text:style-name="T46"/></text:p>
      <text:p text:style-name="P9" loext:marker-style-name="T43"><text:span text:style-name="T33"/></text:p>
      <text:p text:style-name="P9" loext:marker-style-name="T24"><text:span text:style-name="T25">3.3. Desempenho de Consultas Complexas (Junções, Subconsultas e Agrupamentos)</text:span></text:p>
      <text:p text:style-name="P9" loext:marker-style-name="T24"><text:span text:style-name="T25"/></text:p>
      <text:p text:style-name="P9" loext:marker-style-name="T18"><text:span text:style-name="T22"><text:tab/>Esta subseção consolida os testes com maior nível de complexidade computacional, envolvendo processamento aritmético e cruzamento de grandes coleções de registros.</text:span></text:p>
      <text:p text:style-name="P9" loext:marker-style-name="T34"><draw:frame draw:style-name="fr2" draw:name="Figura10" text:anchor-type="char" svg:width="17cm" svg:height="11.231cm" draw:z-index="9"><draw:image xlink:href="Pictures/10000001000005D3000003D93E85F132.png" xlink:type="simple" xlink:show="embed" xlink:actuate="onLoad" draw:mime-type="image/png"/></draw:frame><text:soft-page-break/><text:span text:style-name="T35"/></text:p>
      <text:p text:style-name="P9" loext:marker-style-name="T34"><draw:frame draw:style-name="fr2" draw:name="Figura11" text:anchor-type="char" svg:width="17cm" svg:height="8.34cm" draw:z-index="10"><draw:image xlink:href="Pictures/1000000100000572000002AC2169BF9F.png" xlink:type="simple" xlink:show="embed" xlink:actuate="onLoad" draw:mime-type="image/png"/></draw:frame><text:span text:style-name="T35"/></text:p>
      <text:p text:style-name="P9" loext:marker-style-name="T34"><text:span text:style-name="T35"/></text:p>
      <text:p text:style-name="P9" loext:marker-style-name="T34"><text:span text:style-name="T35"/></text:p>
      <text:p text:style-name="P9" loext:marker-style-name="T34"><draw:frame draw:style-name="fr1" draw:name="Figura12" text:anchor-type="char" svg:width="17cm" svg:height="8.34cm" draw:z-index="11"><draw:image xlink:href="Pictures/1000000100000572000002AC97F9C29E.png" xlink:type="simple" xlink:show="embed" xlink:actuate="onLoad" draw:mime-type="image/png"/></draw:frame><text:soft-page-break/><text:span text:style-name="T35"/></text:p>
      <text:p text:style-name="P9" loext:marker-style-name="T34"><text:span text:style-name="T35"/></text:p>
      <text:p text:style-name="P9" loext:marker-style-name="T34"><draw:frame draw:style-name="fr2" draw:name="Figura13" text:anchor-type="char" svg:width="17cm" svg:height="8.352cm" draw:z-index="12"><draw:image xlink:href="Pictures/1000000100000570000002AC12181349.png" xlink:type="simple" xlink:show="embed" xlink:actuate="onLoad" draw:mime-type="image/png"/></draw:frame><text:span text:style-name="T35"/></text:p>
      <text:p text:style-name="P9" loext:marker-style-name="T34"><text:span text:style-name="T35"/></text:p>
      <text:p text:style-name="P9" loext:marker-style-name="T34"><text:span text:style-name="T35"/></text:p>
      <text:p text:style-name="P9" loext:marker-style-name="T34"><text:span text:style-name="T35"/></text:p>
      <text:p text:style-name="P9" loext:marker-style-name="T34"><draw:frame draw:style-name="fr2" draw:name="Figura14" text:anchor-type="char" svg:width="17cm" svg:height="8.352cm" draw:z-index="13"><draw:image xlink:href="Pictures/1000000100000570000002ACB493D24C.png" xlink:type="simple" xlink:show="embed" xlink:actuate="onLoad" draw:mime-type="image/png"/></draw:frame><text:soft-page-break/><text:span text:style-name="T35"/></text:p>
      <text:p text:style-name="P9" loext:marker-style-name="T34"><text:span text:style-name="T35"/></text:p>
      <text:p text:style-name="P9" loext:marker-style-name="T34"><draw:frame draw:style-name="fr2" draw:name="Figura15" text:anchor-type="char" svg:width="17cm" svg:height="8.359cm" draw:z-index="14"><draw:image xlink:href="Pictures/100000010000056F000002AC14714438.png" xlink:type="simple" xlink:show="embed" xlink:actuate="onLoad" draw:mime-type="image/png"/></draw:frame><text:span text:style-name="T35"/></text:p>
      <text:p text:style-name="P9" loext:marker-style-name="T36"><draw:frame draw:style-name="fr2" draw:name="Figura16" text:anchor-type="char" svg:width="17cm" svg:height="8.359cm" draw:z-index="15"><draw:image xlink:href="Pictures/100000010000056F000002AC08BE2F6F.png" xlink:type="simple" xlink:show="embed" xlink:actuate="onLoad" draw:mime-type="image/png"/></draw:frame><text:soft-page-break/><text:span text:style-name="T37"/></text:p>
      <text:p text:style-name="P9" loext:marker-style-name="T36"><draw:frame draw:style-name="fr2" draw:name="Figura17" text:anchor-type="char" svg:width="17cm" svg:height="8.322cm" draw:z-index="16"><draw:image xlink:href="Pictures/1000000100000573000002ABB980FFFF.png" xlink:type="simple" xlink:show="embed" xlink:actuate="onLoad" draw:mime-type="image/png"/></draw:frame><text:span text:style-name="T37"/></text:p>
      <text:p text:style-name="P9" loext:marker-style-name="T36"><draw:frame draw:style-name="fr2" draw:name="Figura18" text:anchor-type="char" svg:width="17cm" svg:height="8.322cm" draw:z-index="17"><draw:image xlink:href="Pictures/1000000100000573000002AB89CB4101.png" xlink:type="simple" xlink:show="embed" xlink:actuate="onLoad" draw:mime-type="image/png"/></draw:frame><text:soft-page-break/><text:span text:style-name="T37"/></text:p>
      <text:p text:style-name="P9" loext:marker-style-name="T36"><text:span text:style-name="T37"/></text:p>
      <text:p text:style-name="P20" loext:marker-style-name="T36"><text:span text:style-name="T38">Análise: </text:span></text:p>
      <text:p text:style-name="P20" loext:marker-style-name="T36"><text:span text:style-name="T38"/></text:p>
      <text:p text:style-name="P20" loext:marker-style-name="T36"><text:span text:style-name="T38"><text:tab/></text:span>O resultado mais dramático do estudo se dá na operação de <text:span text:style-name="T44">Agrupamentos e Agregações</text:span>. O PostgreSQL executa a operação em constantes <text:span text:style-name="T40">14.2 </text:span><text:span text:style-name="T40">a </text:span><text:span text:style-name="T40">14.5 </text:span>segundos. O MySQL exibe severas limitações estruturais, extrapolando para mais de 7 minutos (<text:span text:style-name="T40">478.37</text:span><text:span text:style-name="T45"> </text:span>segundos). Isso ocorre porque o PostgreSQL faz uso eficiente de algoritmos de <text:span text:style-name="T20">HashAggregate</text:span><text:span text:style-name="T21"> </text:span>em memória de trabalho configurada (work_mem), enquanto o MySQL frequentemente recorre a tabelas temporárias em</text:p>
      <text:p text:style-name="P20" loext:marker-style-name="T36">disco quando confrontado com agregações pesadas em bases volumosas. </text:p>
      <text:p text:style-name="P20" loext:marker-style-name="T36"><text:tab/>Em contrapartida, nas junções brutas sem índice, o MySQL conseguiu ser ligeiramente mais veloz na melhor execução devido ao algoritmo otimizado de <text:span text:style-name="T20">Block Nested Loop / Hash Join</text:span><text:span text:style-name="T21"> </text:span>introduzido nas versões estáveis recentes do MySQL 8.</text:p>
      <text:p text:style-name="P20" loext:marker-style-name="T36"/>
      <text:p text:style-name="P20" loext:marker-style-name="T36"/>
      <text:p text:style-name="P9" loext:marker-style-name="T23"><text:span text:style-name="T11">4. Conclusões</text:span></text:p>
      <text:p text:style-name="P9" loext:marker-style-name="T23"><text:span text:style-name="T11"/></text:p>
      <text:p text:style-name="P9" loext:marker-style-name="T18"><text:span text:style-name="T22"><text:tab/></text:span><text:span text:style-name="T15">A partir do extenso conjunto de dados empíricos levantados, conclui-se que o </text:span><text:span text:style-name="T47">PostgreSQL</text:span><text:span text:style-name="T48"> </text:span><text:span text:style-name="T15">apresenta um desempenho global superior e muito mais robusto e previsível para o processamento de bases de dados complexas e volumosas como o recorte do Stack Overflow. Ele se destacou de maneira incontestável em duas frentes: na escrita concorrente e pesada (onde seus tempos foram menores que os do MySQL) e em consultas analíticas de agregação profunda, minimizando o impacto de gargalos de I/O de disco através de algoritmos avançados de ordenação e junção em RAM.</text:span></text:p>
      <text:p text:style-name="P9" loext:marker-style-name="T18"><text:span text:style-name="T15"><text:tab/>O </text:span><text:span text:style-name="T47">MySQL</text:span><text:span text:style-name="T48"> </text:span><text:span text:style-name="T15">provou ser uma alternativa extremamente veloz e competitiva para leituras simples indexadas e buscas pontuais por chave primária, onde sua estrutura de índices clusterizados (onde os dados residem junto com as folhas da própria chave primária) reduz o salto de ponteiros físicos e agiliza respostas. </text:span><text:span text:style-name="T49">No entanto</text:span><text:span text:style-name="T15">, sua severa degradação em agrupamentos complexos e modificações massivas exige do administrador de banco de dados (DBA) um esforço muito maior </text:span><text:span text:style-name="T49">na modelagem</text:span><text:span text:style-name="T15"> de parâmetros </text:span><text:span text:style-name="T22">globais e desenho cirúrgico de índices secundários.</text:span></text:p>
      <text:p text:style-name="P9" loext:marker-style-name="T18"><text:span text:style-name="T22"><text:tab/>Por fim, o estudo evidencia que a simples criação de índices sem planejamento não garante ganhos de performance. Índices não-ideais ou aplicados a colunas varridas por operadores de texto como LIKE %pattern% adicionam custos de manutenção e armazenamento sem trazer benefícios de velocidade, conforme documentado nos resultados obtidos.</text:span></text:p>
      <text:p text:style-name="P9" loext:marker-style-name="T18"><text:span text:style-name="T22"/></text:p>
      <text:p text:style-name="P9" loext:marker-style-name="T18"><text:span text:style-name="T22"/></text:p>
      <text:p text:style-name="P9" loext:marker-style-name="T18"><text:span text:style-name="T22"/></text:p>
      <text:p text:style-name="P9" loext:marker-style-name="T18"><text:span text:style-name="T22"/></text:p>
      <text:p text:style-name="P9" loext:marker-style-name="T23"><text:soft-page-break/><text:span text:style-name="T11">5. Link para o Repositório com o Código dos Experimentos</text:span></text:p>
      <text:p text:style-name="P9" loext:marker-style-name="T23"><text:span text:style-name="T11"/></text:p>
      <text:p text:style-name="P9" loext:marker-style-name="T18"><text:span text:style-name="T22"><text:tab/>O código-fonte completo contendo os scripts de criação de tabelas, inserção de dados, automação de testes em Python e as planilhas brutas de medições estão disponíveis em:</text:span></text:p>
      <text:p text:style-name="P9" loext:marker-style-name="T18"><text:span text:style-name="T22"/></text:p>
      <text:p text:style-name="P9" loext:marker-style-name="T50"><text:a xlink:type="simple" xlink:href="https://github.com/SQL-2026-Trabalho/ep1" text:style-name="Internet_20_link" text:visited-style-name="Visited_20_Internet_20_Link"><text:span text:style-name="T26">https://github.com/SQL-2026-Trabalho/ep1</text:span></text:a></text:p>
      <text:p text:style-name="P9" loext:marker-style-name="T50"><text:span text:style-name="T26"/></text:p>
      <text:p text:style-name="P21" loext:marker-style-name="T50"><text:span text:style-name="T26"/></text:p>
      <text:p text:style-name="P9" loext:marker-style-name="T23"><text:span text:style-name="T11">6. Link para o Vídeo de Apresentação do Trabalho</text:span><text:span text:style-name="T11"/></text:p>
      <text:p text:style-name="P9" loext:marker-style-name="T18"><text:span text:style-name="T22">A gravação </text:span><text:span text:style-name="T51">da apresentação</text:span><text:span text:style-name="T22"> dos resultados pode ser acessada pelo link:</text:span></text:p>
      <text:p text:style-name="P9" loext:marker-style-name="T18"><text:span text:style-name="T26"/></text:p>
      <text:p text:style-name="P22" loext:marker-style-name="T50"><text:span text:style-name="T22">****inserir link do youtube</text:span></text:p>
      <text:p text:style-name="P22" loext:marker-style-name="T50"><text:span text:style-name="T22"/></text:p>
      <text:p text:style-name="P22" loext:marker-style-name="T50"><text:span text:style-name="T22"/></text:p>
      <text:p text:style-name="P9" loext:marker-style-name="T50"><text:span text:style-name="T26"/></text:p>
      <text:p text:style-name="P9" loext:marker-style-name="T23"><text:span text:style-name="T11">7. Referências</text:span></text:p>
      <text:p text:style-name="P9" loext:marker-style-name="T23"><text:span text:style-name="T11"/></text:p>
      <text:p text:style-name="P9" loext:marker-style-name="T18"><text:span text:style-name="T22">[1] SILBERSCHATZ, Abraham; KORTH, Henry F.; SUDARSHAN, S. </text:span><text:span text:style-name="T52">Sistema de Banco de Dados</text:span><text:span text:style-name="T22">. 7. ed.</text:span></text:p>
      <text:p text:style-name="P9" loext:marker-style-name="T18"><text:span text:style-name="T22">Rio de Janeiro: GEN LTC, 2020.</text:span><text:span text:style-name="T22"/></text:p>
      <text:p text:style-name="P9" loext:marker-style-name="T18"><text:span text:style-name="T22">[2] POSTGRESQL GLOBAL DEVELOPMENT GROUP. </text:span><text:span text:style-name="T52">PostgreSQL 15.0 Documentation</text:span><text:span text:style-name="T22">. Disponível</text:span></text:p>
      <text:p text:style-name="P9" loext:marker-style-name="T18"><text:span text:style-name="T22">em: https://www.postgresql.org/docs/15/index.html. Acesso em: maio 2026.</text:span><text:span text:style-name="T22"/></text:p>
      <text:p text:style-name="P9" loext:marker-style-name="T18"><text:span text:style-name="T22">[3] ORACLE CORPORATION. </text:span><text:span text:style-name="T52">MySQL 8.0 Reference Manual</text:span><text:span text:style-name="T22">. Disponível em: https://dev.mysql.com/doc/</text:span></text:p>
      <text:p text:style-name="P9" loext:marker-style-name="T18"><text:span text:style-name="T22">refman/8.0/en/. Acesso em: maio 2026.</text:span><text:span text:style-name="T22"/></text:p>
      <text:p text:style-name="P4" loext:marker-style-name="T10"><text:span text:style-name="T33"/></text:p>
      <text:p text:style-name="P5"><text:span text:style-name="T53"/></text:p>
      <text:p text:style-name="P5"><text:span text:style-name="T53"/></text:p>
      <text:p text:style-name="P5"><text:span text:style-name="T5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-Sans" svg:font-family="Liberation-Sans" style:font-pitch="variable"/>
    <style:font-face style:name="Liberation-Sans-Bold" svg:font-family="Liberation-Sans-Bold" style:font-pitch="variable"/>
    <style:font-face style:name="Liberation-Sans-Italic" svg:font-family="Liberation-Sans-Italic" style:font-pitch="variable"/>
    <style:font-face style:name="Liberation-Serif-Bold-Italic" svg:font-family="Liberation-Serif-Bold-Italic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RomNo9L-Regu" svg:font-family="NimbusRomNo9L-Regu" style:font-pitch="variable"/>
    <style:font-face style:name="Noto-Sans-Mono" svg:font-family="Noto-Sans-Mono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pitch="variable" fo:font-size="12pt" style:font-size-asian="12pt"/>
    </style:style>
    <style:style style:name="ListLabel_20_1" style:display-name="ListLabel 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2T21:28:37.458000000</meta:creation-date>
    <dc:title>Modelo para trabalho de Avaliação de Desempenho de BD - 2024- IME/USP</dc:title>
    <dc:date>2026-05-22T22:40:11.125000000</dc:date>
    <meta:editing-duration>PT55M54S</meta:editing-duration>
    <meta:editing-cycles>18</meta:editing-cycles>
    <meta:generator>LibreOffice/24.8.0.3$Windows_X86_64 LibreOffice_project/0bdf1299c94fe897b119f97f3c613e9dca6be583</meta:generator>
    <meta:document-statistic meta:table-count="0" meta:image-count="18" meta:object-count="0" meta:page-count="12" meta:paragraph-count="70" meta:word-count="1500" meta:character-count="10144" meta:non-whitespace-character-count="8689"/>
  </office:meta>
</office:document-meta>
</file>